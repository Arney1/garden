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nsolas" svg:font-family="Consolas, Consolas_MSFontServi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'Times New Roman_EmbeddedFont', 'Times New Roman_MSFontService', serif"/>
    <style:font-face style:name="Times New Roman1" svg:font-family="'Times New Roman', 'Times New Roman_MSFontService', serif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b81e9" officeooo:paragraph-rsid="001b81e9"/>
    </style:style>
    <style:style style:name="P2" style:family="paragraph" style:parent-style-name="Heading_20_1">
      <style:text-properties officeooo:rsid="0021ec84" officeooo:paragraph-rsid="0021ec84"/>
    </style:style>
    <style:style style:name="P3" style:family="paragraph" style:parent-style-name="Text_20_body">
      <style:text-properties officeooo:paragraph-rsid="001b81e9"/>
    </style:style>
    <style:style style:name="P4" style:family="paragraph" style:parent-style-name="Text_20_body">
      <style:text-properties officeooo:rsid="001b81e9" officeooo:paragraph-rsid="001b81e9"/>
    </style:style>
    <style:style style:name="P5" style:family="paragraph" style:parent-style-name="Text_20_body">
      <style:text-properties style:font-name="Liberation Mono" officeooo:rsid="001b81e9" officeooo:paragraph-rsid="001b81e9"/>
    </style:style>
    <style:style style:name="P6" style:family="paragraph" style:parent-style-name="Text_20_body">
      <style:text-properties style:font-name="Liberation Serif" fo:font-weight="normal" officeooo:rsid="001f8d9d" officeooo:paragraph-rsid="001f8d9d" style:font-weight-asian="normal" style:font-weight-complex="normal"/>
    </style:style>
    <style:style style:name="P7" style:family="paragraph" style:parent-style-name="Text_20_body" style:list-style-name="L1">
      <style:text-properties style:font-name="Liberation Serif" fo:font-weight="normal" officeooo:rsid="001f8d9d" officeooo:paragraph-rsid="001f8d9d" style:font-weight-asian="normal" style:font-weight-complex="normal"/>
    </style:style>
    <style:style style:name="P8" style:family="paragraph" style:parent-style-name="Text_20_body" style:list-style-name="L2">
      <style:text-properties style:font-name="Liberation Serif" officeooo:rsid="001f8d9d"/>
    </style:style>
    <style:style style:name="P9" style:family="paragraph" style:parent-style-name="Text_20_body">
      <style:paragraph-properties fo:text-align="justify" style:justify-single-word="false"/>
      <style:text-properties style:font-name="Liberation Mono" officeooo:rsid="001b81e9" officeooo:paragraph-rsid="001f8d9d"/>
    </style:style>
    <style:style style:name="P10" style:family="paragraph" style:parent-style-name="Text_20_body" style:list-style-name="L3">
      <style:paragraph-properties fo:text-align="justify" style:justify-single-word="false"/>
      <style:text-properties style:font-name="Liberation Serif" fo:font-weight="normal" officeooo:rsid="001f8d9d" officeooo:paragraph-rsid="001f8d9d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Liberation Serif" fo:font-weight="normal" officeooo:rsid="001f8d9d" officeooo:paragraph-rsid="001f8d9d" style:font-weight-asian="normal" style:font-weight-complex="normal"/>
    </style:style>
    <style:style style:name="P12" style:family="paragraph" style:parent-style-name="Table_20_Contents">
      <style:text-properties officeooo:rsid="001b81e9" officeooo:paragraph-rsid="001b81e9"/>
    </style:style>
    <style:style style:name="P13" style:family="paragraph" style:parent-style-name="Table_20_Contents">
      <style:text-properties style:font-name="Liberation Mono"/>
    </style:style>
    <style:style style:name="P14" style:family="paragraph" style:parent-style-name="Standard">
      <style:text-properties style:font-name="Liberation Mono" officeooo:paragraph-rsid="001b81e9"/>
    </style:style>
    <style:style style:name="P15" style:family="paragraph" style:parent-style-name="Text_20_body">
      <style:paragraph-properties fo:text-align="justify" style:justify-single-word="false"/>
      <style:text-properties officeooo:paragraph-rsid="001cec94"/>
    </style:style>
    <style:style style:name="P16" style:family="paragraph" style:parent-style-name="Heading_20_2">
      <style:text-properties officeooo:rsid="0023b1b0" officeooo:paragraph-rsid="0023b1b0"/>
    </style:style>
    <style:style style:name="P17" style:family="paragraph" style:parent-style-name="Heading_20_3">
      <style:text-properties officeooo:rsid="0023b1b0" officeooo:paragraph-rsid="0023b1b0"/>
    </style:style>
    <style:style style:name="P18" style:family="paragraph" style:parent-style-name="Text_20_body">
      <style:paragraph-properties fo:margin-left="0in" fo:margin-right="0in" fo:margin-top="0in" fo:margin-bottom="0.1043in" style:contextual-spacing="false" style:line-height-at-least="0.2083in" fo:text-align="start" style:justify-single-word="false" fo:text-indent="0in" style:auto-text-indent="false" fo:padding="0in" fo:border="none"/>
      <style:text-properties fo:font-variant="normal" fo:text-transform="none" style:font-name="Liberation Mono" fo:font-style="normal" fo:font-weight="normal"/>
    </style:style>
    <style:style style:name="P19" style:family="paragraph" style:parent-style-name="Text_20_body">
      <loext:graphic-properties draw:fill="none" draw:fill-color="#ffffff"/>
      <style:paragraph-properties fo:margin-left="0in" fo:margin-right="0in" fo:margin-top="0in" fo:margin-bottom="0.1043in" style:contextual-spacing="false" style:line-height-at-least="0.2083in" fo:text-align="start" style:justify-single-word="false" fo:text-indent="0in" style:auto-text-indent="false" fo:background-color="transparent" fo:padding="0in" fo:border="none"/>
      <style:text-properties fo:font-variant="normal" fo:text-transform="none" style:font-name="Liberation Mono" fo:font-style="normal" fo:font-weight="normal"/>
    </style:style>
    <style:style style:name="P20" style:family="paragraph" style:parent-style-name="Text_20_body">
      <style:paragraph-properties fo:line-height="100%"/>
      <style:text-properties fo:font-variant="normal" fo:text-transform="none" style:font-name="Liberation Mono" fo:font-style="normal" fo:font-weight="normal" officeooo:paragraph-rsid="0023b1b0"/>
    </style:style>
    <style:style style:name="P21" style:family="paragraph" style:parent-style-name="Text_20_body">
      <loext:graphic-properties draw:fill="none" draw:fill-color="#ffffff"/>
      <style:paragraph-properties fo:margin-left="0in" fo:margin-right="0in" fo:margin-top="0.1665in" fo:margin-bottom="0.1665in" style:contextual-spacing="false" fo:line-height="100%" fo:text-align="start" style:justify-single-word="false" fo:text-indent="0in" style:auto-text-indent="false" fo:background-color="transparent" fo:padding="0in" fo:border="none"/>
      <style:text-properties fo:font-variant="normal" fo:text-transform="none" style:font-name="Liberation Mono"/>
    </style:style>
    <style:style style:name="P22" style:family="paragraph" style:parent-style-name="Text_20_body">
      <loext:graphic-properties draw:fill="none" draw:fill-color="#ffffff"/>
      <style:paragraph-properties fo:margin-left="0in" fo:margin-right="0in" fo:margin-top="0.1665in" fo:margin-bottom="0.1665in" style:contextual-spacing="false" fo:line-height="100%" fo:text-align="start" style:justify-single-word="false" fo:text-indent="0in" style:auto-text-indent="false" fo:background-color="transparent" fo:padding="0in" fo:border="none"/>
      <style:text-properties fo:font-variant="normal" fo:text-transform="none" style:font-name="Liberation Mono" fo:font-style="normal" fo:font-weight="normal"/>
    </style:style>
    <style:style style:name="P23" style:family="paragraph" style:parent-style-name="Text_20_body">
      <style:text-properties officeooo:paragraph-rsid="0023b1b0"/>
    </style:style>
    <style:style style:name="P24" style:family="paragraph" style:parent-style-name="Text_20_body">
      <style:text-properties fo:font-variant="normal" fo:text-transform="none" style:font-name="Liberation Mono" fo:font-style="normal" fo:font-weight="normal" officeooo:paragraph-rsid="0023b1b0"/>
    </style:style>
    <style:style style:name="P25" style:family="paragraph" style:parent-style-name="Text_20_body">
      <loext:graphic-properties draw:fill="none" draw:fill-color="#ffffff"/>
      <style:paragraph-properties fo:margin-left="0in" fo:margin-right="0in" fo:margin-top="0in" fo:margin-bottom="0.1043in" style:contextual-spacing="false" style:line-height-at-least="0.2083in" fo:text-align="start" style:justify-single-word="false" fo:text-indent="0in" style:auto-text-indent="false" fo:background-color="transparent" fo:padding="0in" fo:border="none"/>
      <style:text-properties fo:font-variant="normal" fo:text-transform="none" style:font-name="Liberation Mono"/>
    </style:style>
    <style:style style:name="P26" style:family="paragraph" style:parent-style-name="Text_20_body">
      <style:text-properties fo:font-variant="normal" fo:text-transform="none" fo:font-style="normal" fo:font-weight="normal" officeooo:paragraph-rsid="0023b1b0"/>
    </style:style>
    <style:style style:name="P27" style:family="paragraph" style:parent-style-name="Text_20_body">
      <loext:graphic-properties draw:fill="none" draw:fill-color="#ffffff"/>
      <style:paragraph-properties fo:margin-left="0in" fo:margin-right="0in" fo:margin-top="0in" fo:margin-bottom="0.1043in" style:contextual-spacing="false" style:line-height-at-least="0.2083in" fo:text-align="start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28" style:family="paragraph" style:parent-style-name="Text_20_body">
      <loext:graphic-properties draw:fill="none" draw:fill-color="#ffffff"/>
      <style:paragraph-properties fo:margin-left="0in" fo:margin-right="0in" fo:margin-top="0in" fo:margin-bottom="0.1043in" style:contextual-spacing="false" style:line-height-at-least="0.2083in" fo:text-align="start" style:justify-single-word="false" fo:text-indent="0in" style:auto-text-indent="false" fo:background-color="transparent" fo:padding="0in" fo:border="none"/>
      <style:text-properties fo:font-variant="normal" fo:text-transform="none" officeooo:paragraph-rsid="0023b1b0"/>
    </style:style>
    <style:style style:name="P29" style:family="paragraph" style:parent-style-name="Heading_20_3">
      <style:text-properties officeooo:rsid="0023b1b0" officeooo:paragraph-rsid="002564b8"/>
    </style:style>
    <style:style style:name="P30" style:family="paragraph" style:parent-style-name="Heading_20_3">
      <style:text-properties officeooo:paragraph-rsid="002564b8"/>
    </style:style>
    <style:style style:name="P31" style:family="paragraph" style:parent-style-name="Text_20_body" style:list-style-name="L4">
      <loext:graphic-properties draw:fill="none" draw:fill-color="#ffffff"/>
      <style:paragraph-properties fo:margin-left="0.25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2pt" fo:font-style="normal" fo:font-weight="normal"/>
    </style:style>
    <style:style style:name="P32" style:family="paragraph" style:parent-style-name="Text_20_body" style:list-style-name="L5">
      <loext:graphic-properties draw:fill="none" draw:fill-color="#ffffff"/>
      <style:paragraph-properties fo:margin-left="0.25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2pt" fo:font-style="normal" fo:font-weight="normal"/>
    </style:style>
    <style:style style:name="P33" style:family="paragraph" style:parent-style-name="Text_20_body" style:list-style-name="L6">
      <loext:graphic-properties draw:fill="none" draw:fill-color="#ffffff"/>
      <style:paragraph-properties fo:margin-left="0.25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2pt" fo:font-style="normal" fo:font-weight="normal"/>
    </style:style>
    <style:style style:name="P34" style:family="paragraph" style:parent-style-name="Text_20_body" style:list-style-name="L7">
      <loext:graphic-properties draw:fill="none" draw:fill-color="#ffffff"/>
      <style:paragraph-properties fo:margin-left="0.25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2pt" fo:font-style="normal" fo:font-weight="normal"/>
    </style:style>
    <style:style style:name="P35" style:family="paragraph" style:parent-style-name="Text_20_body">
      <loext:graphic-properties draw:fill="none" draw:fill-color="#ffffff"/>
      <style:paragraph-properties fo:margin-left="0in" fo:margin-right="0in" style:line-height-at-least="0.2189in" fo:text-align="start" style:justify-single-word="false" fo:text-indent="0in" style:auto-text-indent="false" fo:background-color="transparent" fo:padding="0in" fo:border="none"/>
      <style:text-properties fo:font-variant="normal" fo:text-transform="none" fo:font-style="normal" fo:font-weight="normal"/>
    </style:style>
    <style:style style:name="P36" style:family="paragraph" style:parent-style-name="Text_20_body" style:list-style-name="L8">
      <loext:graphic-properties draw:fill="none" draw:fill-color="#ffffff"/>
      <style:paragraph-properties fo:margin-left="0.25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2pt" fo:font-style="normal" fo:font-weight="normal"/>
    </style:style>
    <style:style style:name="P37" style:family="paragraph" style:parent-style-name="Text_20_body" style:list-style-name="L9">
      <loext:graphic-properties draw:fill="none" draw:fill-color="#ffffff"/>
      <style:paragraph-properties fo:margin-left="0.25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2pt" fo:font-style="normal" fo:font-weight="normal"/>
    </style:style>
    <style:style style:name="P38" style:family="paragraph" style:parent-style-name="Text_20_body" style:list-style-name="L10">
      <loext:graphic-properties draw:fill="none" draw:fill-color="#ffffff"/>
      <style:paragraph-properties fo:margin-left="0.25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2pt" fo:font-style="normal" fo:font-weight="normal"/>
    </style:style>
    <style:style style:name="P39" style:family="paragraph" style:parent-style-name="Text_20_body" style:list-style-name="L11">
      <loext:graphic-properties draw:fill="none" draw:fill-color="#ffffff"/>
      <style:paragraph-properties fo:margin-left="0.25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2pt" fo:font-style="normal" fo:font-weight="normal"/>
    </style:style>
    <style:style style:name="P40" style:family="paragraph" style:parent-style-name="Text_20_body" style:list-style-name="L12">
      <loext:graphic-properties draw:fill="none" draw:fill-color="#ffffff"/>
      <style:paragraph-properties fo:margin-left="0.25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2pt" fo:font-style="normal" fo:font-weight="normal"/>
    </style:style>
    <style:style style:name="P41" style:family="paragraph" style:parent-style-name="Text_20_body" style:list-style-name="L13">
      <loext:graphic-properties draw:fill="none" draw:fill-color="#ffffff"/>
      <style:paragraph-properties fo:margin-left="0.25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2pt" fo:font-style="normal" fo:font-weight="normal"/>
    </style:style>
    <style:style style:name="P42" style:family="paragraph" style:parent-style-name="Text_20_body" style:list-style-name="L14">
      <loext:graphic-properties draw:fill="none" draw:fill-color="#ffffff"/>
      <style:paragraph-properties fo:margin-left="0.25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2pt" fo:font-style="normal" fo:font-weight="normal"/>
    </style:style>
    <style:style style:name="P43" style:family="paragraph" style:parent-style-name="Text_20_body" style:list-style-name="L15">
      <loext:graphic-properties draw:fill="none" draw:fill-color="#ffffff"/>
      <style:paragraph-properties fo:margin-left="0.25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2pt" fo:font-style="normal" fo:font-weight="normal"/>
    </style:style>
    <style:style style:name="P44" style:family="paragraph" style:parent-style-name="Text_20_body" style:list-style-name="L16">
      <loext:graphic-properties draw:fill="none" draw:fill-color="#ffffff"/>
      <style:paragraph-properties fo:margin-left="0.25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2pt" fo:font-style="normal" fo:font-weight="normal"/>
    </style:style>
    <style:style style:name="P45" style:family="paragraph" style:parent-style-name="Text_20_body" style:list-style-name="L17">
      <loext:graphic-properties draw:fill="none" draw:fill-color="#ffffff"/>
      <style:paragraph-properties fo:margin-left="0.25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2pt" fo:font-style="normal" fo:font-weight="normal"/>
    </style:style>
    <style:style style:name="P46" style:family="paragraph" style:parent-style-name="Text_20_body" style:list-style-name="L18">
      <loext:graphic-properties draw:fill="none" draw:fill-color="#ffffff"/>
      <style:paragraph-properties fo:margin-left="0.25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2pt" fo:font-style="normal" fo:font-weight="normal"/>
    </style:style>
    <style:style style:name="P47" style:family="paragraph" style:parent-style-name="Text_20_body" style:list-style-name="L19">
      <loext:graphic-properties draw:fill="none" draw:fill-color="#ffffff"/>
      <style:paragraph-properties fo:margin-left="0.25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2pt" fo:font-style="normal" fo:font-weight="normal"/>
    </style:style>
    <style:style style:name="P48" style:family="paragraph" style:parent-style-name="Text_20_body" style:list-style-name="L20">
      <loext:graphic-properties draw:fill="none" draw:fill-color="#ffffff"/>
      <style:paragraph-properties fo:margin-left="0.25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2pt" fo:font-style="normal" fo:font-weight="normal"/>
    </style:style>
    <style:style style:name="P49" style:family="paragraph" style:parent-style-name="Text_20_body" style:list-style-name="L21">
      <loext:graphic-properties draw:fill="none" draw:fill-color="#ffffff"/>
      <style:paragraph-properties fo:margin-left="0.25in" fo:margin-right="0in" style:line-height-at-least="0.1665in" fo:text-align="start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2pt" fo:font-style="normal" fo:font-weight="normal"/>
    </style:style>
    <style:style style:name="P50" style:family="paragraph" style:parent-style-name="Text_20_body">
      <style:paragraph-properties fo:text-align="justify" style:justify-single-word="false"/>
      <style:text-properties fo:font-variant="normal" fo:text-transform="none" fo:font-style="normal" fo:font-weight="normal" officeooo:paragraph-rsid="0023b1b0"/>
    </style:style>
    <style:style style:name="P51" style:family="paragraph" style:parent-style-name="Text_20_body">
      <loext:graphic-properties draw:fill="none" draw:fill-color="#ffffff"/>
      <style:paragraph-properties fo:margin-left="0in" fo:margin-right="0in" fo:margin-top="0.1665in" fo:margin-bottom="0.1665in" style:contextual-spacing="false" style:line-height-at-least="0.2398in" fo:text-align="justify" style:justify-single-word="false" fo:text-indent="0in" style:auto-text-indent="false" fo:background-color="transparent" fo:padding="0in" fo:border="none"/>
      <style:text-properties fo:font-variant="normal" fo:text-transform="none" fo:font-style="normal" fo:font-weight="normal"/>
    </style:style>
    <style:style style:name="P52" style:family="paragraph" style:parent-style-name="Text_20_body">
      <style:paragraph-properties fo:margin-left="0in" fo:margin-right="0in" fo:margin-top="0in" fo:margin-bottom="0.1043in" style:contextual-spacing="false" style:line-height-at-least="0.2398in" fo:text-align="justify" style:justify-single-word="false" fo:text-indent="0in" style:auto-text-indent="false" fo:padding="0in" fo:border="none"/>
      <style:text-properties fo:font-variant="normal" fo:text-transform="none" fo:font-style="normal" fo:font-weight="normal" officeooo:paragraph-rsid="0023b1b0"/>
    </style:style>
    <style:style style:name="P53" style:family="paragraph" style:parent-style-name="Text_20_body">
      <loext:graphic-properties draw:fill="none" draw:fill-color="#ffffff"/>
      <style:paragraph-properties fo:margin-left="0in" fo:margin-right="0in" fo:margin-top="0in" fo:margin-bottom="0.1043in" style:contextual-spacing="false" style:line-height-at-least="0.2398in" fo:text-align="justify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54" style:family="paragraph" style:parent-style-name="Text_20_body" style:list-style-name="L22">
      <style:paragraph-properties fo:margin-left="0.25in" fo:margin-right="0in" style:line-height-at-least="0.2398in" fo:text-align="start" style:justify-single-word="false" fo:text-indent="0in" style:auto-text-indent="false" fo:padding="0in" fo:border="none"/>
      <style:text-properties fo:font-variant="normal" fo:text-transform="none" style:font-name="Consolas" fo:font-size="12pt" fo:font-style="normal" fo:font-weight="normal" officeooo:paragraph-rsid="0023b1b0"/>
    </style:style>
    <style:style style:name="P55" style:family="paragraph" style:parent-style-name="Text_20_body" style:list-style-name="L23">
      <loext:graphic-properties draw:fill="none" draw:fill-color="#ffffff"/>
      <style:paragraph-properties fo:margin-left="0.25in" fo:margin-right="0in" style:line-height-at-least="0.23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Consolas" fo:font-size="12pt" fo:font-style="normal" fo:font-weight="normal"/>
    </style:style>
    <style:style style:name="P56" style:family="paragraph" style:parent-style-name="Text_20_body" style:list-style-name="L24">
      <loext:graphic-properties draw:fill="none" draw:fill-color="#ffffff"/>
      <style:paragraph-properties fo:margin-left="0.25in" fo:margin-right="0in" style:line-height-at-least="0.23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Consolas" fo:font-size="12pt" fo:font-style="normal" fo:font-weight="normal"/>
    </style:style>
    <style:style style:name="P57" style:family="paragraph" style:parent-style-name="Text_20_body" style:list-style-name="L25">
      <loext:graphic-properties draw:fill="none" draw:fill-color="#ffffff"/>
      <style:paragraph-properties fo:margin-left="0.25in" fo:margin-right="0in" style:line-height-at-least="0.23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Consolas" fo:font-size="12pt" fo:font-style="normal" fo:font-weight="normal"/>
    </style:style>
    <style:style style:name="P58" style:family="paragraph" style:parent-style-name="Text_20_body" style:list-style-name="L26">
      <loext:graphic-properties draw:fill="none" draw:fill-color="#ffffff"/>
      <style:paragraph-properties fo:margin-left="0.25in" fo:margin-right="0in" style:line-height-at-least="0.23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Consolas" fo:font-size="12pt" fo:font-style="normal" fo:font-weight="normal"/>
    </style:style>
    <style:style style:name="P59" style:family="paragraph" style:parent-style-name="Text_20_body" style:list-style-name="L27">
      <loext:graphic-properties draw:fill="none" draw:fill-color="#ffffff"/>
      <style:paragraph-properties fo:margin-left="0.25in" fo:margin-right="0in" style:line-height-at-least="0.2083in" fo:text-align="start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2pt" fo:font-style="normal" fo:font-weight="normal"/>
    </style:style>
    <style:style style:name="P60" style:family="paragraph" style:parent-style-name="Text_20_body" style:list-style-name="L28">
      <loext:graphic-properties draw:fill="none" draw:fill-color="#ffffff"/>
      <style:paragraph-properties fo:margin-left="0.25in" fo:margin-right="0in" style:line-height-at-least="0.23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Consolas" fo:font-size="12pt" fo:font-style="normal" fo:font-weight="normal"/>
    </style:style>
    <style:style style:name="P61" style:family="paragraph" style:parent-style-name="Text_20_body" style:list-style-name="L29">
      <loext:graphic-properties draw:fill="none" draw:fill-color="#ffffff"/>
      <style:paragraph-properties fo:margin-left="0.25in" fo:margin-right="0in" style:line-height-at-least="0.23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Consolas" fo:font-size="12pt" fo:font-style="normal" fo:font-weight="normal"/>
    </style:style>
    <style:style style:name="P62" style:family="paragraph" style:parent-style-name="Text_20_body" style:list-style-name="L30">
      <loext:graphic-properties draw:fill="none" draw:fill-color="#ffffff"/>
      <style:paragraph-properties fo:margin-left="0.25in" fo:margin-right="0in" style:line-height-at-least="0.23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Consolas" fo:font-size="12pt" fo:font-style="normal" fo:font-weight="normal"/>
    </style:style>
    <style:style style:name="P63" style:family="paragraph" style:parent-style-name="Text_20_body" style:list-style-name="L31">
      <loext:graphic-properties draw:fill="none" draw:fill-color="#ffffff"/>
      <style:paragraph-properties fo:margin-left="0.25in" fo:margin-right="0in" style:line-height-at-least="0.23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Consolas" fo:font-size="12pt" fo:font-style="normal" fo:font-weight="normal"/>
    </style:style>
    <style:style style:name="P64" style:family="paragraph" style:parent-style-name="Text_20_body" style:list-style-name="L32">
      <loext:graphic-properties draw:fill="none" draw:fill-color="#ffffff"/>
      <style:paragraph-properties fo:margin-left="0.25in" fo:margin-right="0in" style:line-height-at-least="0.23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Consolas" fo:font-size="12pt" fo:font-style="normal" fo:font-weight="normal"/>
    </style:style>
    <style:style style:name="P65" style:family="paragraph" style:parent-style-name="Text_20_body" style:list-style-name="L33">
      <loext:graphic-properties draw:fill="none" draw:fill-color="#ffffff"/>
      <style:paragraph-properties fo:margin-left="0.25in" fo:margin-right="0in" style:line-height-at-least="0.23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Consolas" fo:font-size="12pt" fo:font-style="normal" fo:font-weight="normal"/>
    </style:style>
    <style:style style:name="P66" style:family="paragraph" style:parent-style-name="Text_20_body" style:list-style-name="L34">
      <loext:graphic-properties draw:fill="none" draw:fill-color="#ffffff"/>
      <style:paragraph-properties fo:margin-left="0.25in" fo:margin-right="0in" style:line-height-at-least="0.23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Consolas" fo:font-size="12pt" fo:font-style="normal" fo:font-weight="normal"/>
    </style:style>
    <style:style style:name="P67" style:family="paragraph" style:parent-style-name="Text_20_body" style:list-style-name="L35">
      <loext:graphic-properties draw:fill="none" draw:fill-color="#ffffff"/>
      <style:paragraph-properties fo:margin-left="0.25in" fo:margin-right="0in" style:line-height-at-least="0.2083in" fo:text-align="start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2pt" fo:font-style="normal" fo:font-weight="normal"/>
    </style:style>
    <style:style style:name="P68" style:family="paragraph" style:parent-style-name="Text_20_body">
      <style:paragraph-properties fo:margin-left="0in" fo:margin-right="0in" fo:margin-top="0in" fo:margin-bottom="0.1043in" style:contextual-spacing="false" style:line-height-at-least="0.2291in" fo:text-align="start" style:justify-single-word="false" fo:text-indent="0in" style:auto-text-indent="false" fo:padding="0in" fo:border="none"/>
      <style:text-properties fo:font-variant="normal" fo:text-transform="none" fo:font-style="normal" fo:font-weight="normal" officeooo:paragraph-rsid="0023b1b0"/>
    </style:style>
    <style:style style:name="P69" style:family="paragraph" style:parent-style-name="Text_20_body">
      <loext:graphic-properties draw:fill="none" draw:fill-color="#ffffff"/>
      <style:paragraph-properties fo:margin-left="0in" fo:margin-right="0in" fo:margin-top="0in" fo:margin-bottom="0.1043in" style:contextual-spacing="false" style:line-height-at-least="0.2291in" fo:text-align="start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70" style:family="paragraph" style:parent-style-name="Text_20_body" style:list-style-name="L36">
      <style:paragraph-properties style:line-height-at-least="0.2083in" fo:text-align="justify" style:justify-single-word="false" fo:padding="0in" fo:border="none"/>
      <style:text-properties fo:font-variant="normal" fo:text-transform="none" style:font-name="Times New Roman1" fo:font-size="12pt" fo:font-style="normal" fo:font-weight="normal" officeooo:paragraph-rsid="0023b1b0"/>
    </style:style>
    <style:style style:name="P71" style:family="paragraph" style:parent-style-name="Text_20_body" style:list-style-name="L36">
      <loext:graphic-properties draw:fill="none" draw:fill-color="#ffffff"/>
      <style:paragraph-properties style:line-height-at-least="0.2083in" fo:text-align="justify" style:justify-single-word="false" fo:background-color="transparent" fo:padding="0in" fo:border="none"/>
      <style:text-properties fo:font-variant="normal" fo:text-transform="none" style:font-name="Times New Roman1" fo:font-size="12pt" fo:font-style="normal" fo:font-weight="normal"/>
    </style:style>
    <style:style style:name="P72" style:family="paragraph" style:parent-style-name="Text_20_body">
      <style:paragraph-properties fo:margin-left="0in" fo:margin-right="0in" fo:margin-top="0in" fo:margin-bottom="0.1043in" style:contextual-spacing="false" style:line-height-at-least="0.2083in" fo:text-align="justify" style:justify-single-word="false" fo:text-indent="0in" style:auto-text-indent="false" fo:padding="0in" fo:border="none"/>
      <style:text-properties officeooo:paragraph-rsid="0023b1b0"/>
    </style:style>
    <style:style style:name="P73" style:family="paragraph" style:parent-style-name="Text_20_body">
      <style:text-properties style:font-name="Times New Roman" fo:font-size="12pt" fo:language="en" fo:country="ID" officeooo:paragraph-rsid="0023b1b0"/>
    </style:style>
    <style:style style:name="T1" style:family="text">
      <style:text-properties officeooo:rsid="0027e4a5"/>
    </style:style>
    <style:style style:name="T2" style:family="text">
      <style:text-properties officeooo:rsid="0023b1b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erif" fo:font-weight="normal" style:font-weight-asian="normal" style:font-weight-complex="normal"/>
    </style:style>
    <style:style style:name="T5" style:family="text">
      <style:text-properties fo:font-weight="normal" officeooo:rsid="001f8d9d" style:font-weight-asian="normal" style:font-weight-complex="normal"/>
    </style:style>
    <style:style style:name="T6" style:family="text">
      <style:text-properties style:font-name="Liberation Serif" fo:font-weight="normal" officeooo:rsid="001e0bc3" style:font-weight-asian="normal" style:font-weight-complex="normal"/>
    </style:style>
    <style:style style:name="T7" style:family="text">
      <style:text-properties style:font-name="Liberation Serif" fo:font-weight="normal" officeooo:rsid="001f8d9d" style:font-weight-asian="normal" style:font-weight-complex="normal"/>
    </style:style>
    <style:style style:name="T8" style:family="text">
      <style:text-properties officeooo:rsid="001fc03f"/>
    </style:style>
    <style:style style:name="T9" style:family="text">
      <style:text-properties officeooo:rsid="002639b3"/>
    </style:style>
    <style:style style:name="T10" style:family="text">
      <style:text-properties fo:font-size="12pt" fo:language="en" fo:country="US"/>
    </style:style>
    <style:style style:name="T11" style:family="text">
      <style:text-properties fo:font-size="12pt" fo:language="en" fo:country="US" fo:font-style="normal" fo:font-weight="normal"/>
    </style:style>
    <style:style style:name="T12" style:family="text">
      <style:text-properties fo:font-style="normal" fo:font-weight="normal"/>
    </style:style>
    <style:style style:name="T13" style:family="text">
      <style:text-properties style:font-name="Times New Roman" fo:font-size="12pt" fo:language="en" fo:country="US"/>
    </style:style>
    <style:style style:name="T14" style:family="text">
      <style:text-properties style:font-name="Times New Roman" fo:font-size="12pt" fo:language="en" fo:country="US" fo:font-style="normal" fo:font-weight="normal"/>
    </style:style>
    <style:style style:name="T15" style:family="text">
      <style:text-properties fo:font-variant="normal" fo:text-transform="none" style:font-name="Times New Roman" fo:font-size="13.5pt" fo:language="en" fo:country="ID" fo:font-style="normal" fo:font-weight="normal"/>
    </style:style>
    <style:style style:name="T16" style:family="text">
      <style:text-properties fo:font-variant="normal" fo:text-transform="none" fo:font-style="normal" fo:font-weight="normal"/>
    </style:style>
    <style:style style:name="T17" style:family="text">
      <style:text-properties style:font-name="Times New Roman" fo:language="en" fo:country="ID"/>
    </style:style>
    <style:style style:name="T18" style:family="text">
      <style:text-properties style:font-name="Times New Roman" fo:font-size="13.5pt" fo:language="en" fo:country="ID"/>
    </style:style>
    <style:style style:name="T19" style:family="text">
      <style:text-properties fo:font-family="'Courier New', 'Courier New_EmbeddedFont', 'Courier New_MSFontService', monospace" fo:font-size="10pt" fo:language="en" fo:country="ID"/>
    </style:style>
    <style:style style:name="T20" style:family="text">
      <style:text-properties fo:font-family="Consolas, Consolas_EmbeddedFont, Consolas_MSFontService, monospace" fo:font-size="12pt" fo:language="en" fo:country="US"/>
    </style:style>
    <style:style style:name="T21" style:family="text">
      <style:text-properties fo:font-family="Consolas, Consolas_EmbeddedFont, Consolas_MSFontService, monospace" fo:font-size="12pt" fo:language="en" fo:country="US" fo:font-style="normal" fo:font-weight="normal"/>
    </style:style>
    <style:style style:name="T22" style:family="text">
      <style:text-properties fo:font-family="Consolas, Consolas_EmbeddedFont, Consolas_MSFontService, monospace" fo:language="en" fo:country="US"/>
    </style:style>
    <style:style style:name="T23" style:family="text">
      <style:text-properties style:font-name="Times New Roman" fo:language="en" fo:country="US"/>
    </style:style>
    <style:style style:name="T24" style:family="text">
      <style:text-properties fo:font-family="'WordVisiCarriageReturn MSFontService', Consolas, Consolas_EmbeddedFont, Consolas_MSFontService, monospace"/>
    </style:style>
    <style:style style:name="T25" style:family="text">
      <style:text-properties style:font-name="Times New Roman" fo:language="en" fo:country="US" fo:font-style="italic"/>
    </style:style>
    <style:style style:name="T26" style:family="text">
      <style:text-properties fo:font-variant="normal" fo:text-transform="none" fo:color="#0563c1" loext:opacity="100%" style:text-line-through-style="none" style:text-line-through-type="none" style:font-name="Times New Roman" fo:font-size="12pt" fo:language="en" fo:country="US" fo:font-style="normal" style:text-underline-style="solid" style:text-underline-width="auto" style:text-underline-color="font-color" fo:font-weight="normal" style:text-blinking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5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7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9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0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1">
      <text:list-level-style-number text:level="1" text:style-name="Numbering_20_Symbols" loext:num-list-format="%1%." style:num-suffix="." style:num-format="1" text:start-value="10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2">
      <text:list-level-style-number text:level="1" text:style-name="Numbering_20_Symbols" loext:num-list-format="%1%." style:num-suffix="." style:num-format="1" text:start-value="1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3">
      <text:list-level-style-number text:level="1" text:style-name="Numbering_20_Symbols" loext:num-list-format="%1%." style:num-suffix="." style:num-format="1" text:start-value="1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4">
      <text:list-level-style-number text:level="1" text:style-name="Numbering_20_Symbols" loext:num-list-format="%1%." style:num-suffix="." style:num-format="1" text:start-value="1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5">
      <text:list-level-style-number text:level="1" text:style-name="Numbering_20_Symbols" loext:num-list-format="%1%." style:num-suffix="." style:num-format="1" text:start-value="1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M: 2415240<text:span text:style-name="T1">33</text:span></text:p>
      <text:p text:style-name="P1">Nama: Arkan Ramadhan Nugraha</text:p>
      <text:p text:style-name="P1">Kelas: 2B-TI4</text:p>
      <text:p text:style-name="P1">Mata Kuliah: Programming Language Pragmatics</text:p>
      <text:h text:style-name="P2" text:outline-level="1">Tugas <text:span text:style-name="T2">1 PPT</text:span></text:h>
      <text:p text:style-name="P1"/>
      <text:h text:style-name="Heading_20_2" text:outline-level="2">Pertanyaan 1</text:h>
      <text:p text:style-name="P3">Kenapa if (x) valid tapi if x error menurut grammar?</text:p>
      <text:p text:style-name="P4">Jawab:</text:p>
      <text:p text:style-name="P4">Grammar CFG/BNF mendefinisikan bentuk if statement sebagai:</text:p>
      <text:p text:style-name="P5">&lt;if-statement&gt; ::= "if" "(" &lt;expression&gt; ")" &lt;statement&gt;</text:p>
      <text:p text:style-name="P5"><text:s text:c="17"/>| "if" "(" &lt;expression&gt; ")" &lt;statement&gt; "else" &lt;statement&gt;</text:p>
      <text:p text:style-name="P6">Aturan tersebut mengharuskan</text:p>
      <text:list xml:id="list2459834481" text:style-name="L1">
        <text:list-item>
          <text:p text:style-name="P7">Aturan ini mewajibkan:</text:p>
        </text:list-item>
        <text:list-item text:style-override="L2">
          <text:p text:style-name="P8"><text:span text:style-name="T3">Setelah keyword </text:span><text:span text:style-name="Strong_20_Emphasis"><text:span text:style-name="Source_20_Text"><text:span text:style-name="T3">if</text:span></text:span></text:span><text:span text:style-name="T3">, harus selalu ada tanda kurung buka </text:span><text:span text:style-name="Strong_20_Emphasis"><text:span text:style-name="Source_20_Text"><text:span text:style-name="T3">(</text:span></text:span></text:span><text:span text:style-name="T3">.</text:span></text:p>
        </text:list-item>
        <text:list-item text:style-override="L2">
          <text:p text:style-name="P8"><text:span text:style-name="T3">Di dalam tanda kurung harus ada sebuah </text:span><text:span text:style-name="Strong_20_Emphasis"><text:span text:style-name="T3">ekspresi</text:span></text:span><text:span text:style-name="T3"> yang bisa dievaluasi menjadi </text:span><text:span text:style-name="Emphasis"><text:span text:style-name="T3">true</text:span></text:span><text:span text:style-name="T3"> atau </text:span><text:span text:style-name="Emphasis"><text:span text:style-name="T3">false</text:span></text:span><text:span text:style-name="T3">.</text:span></text:p>
        </text:list-item>
        <text:list-item text:style-override="L2">
          <text:p text:style-name="P8"><text:span text:style-name="T3">Setelah tanda kurung tutup </text:span><text:span text:style-name="Strong_20_Emphasis"><text:span text:style-name="Source_20_Text"><text:span text:style-name="T3">)</text:span></text:span></text:span><text:span text:style-name="T3">, harus ada sebuah </text:span><text:span text:style-name="Strong_20_Emphasis"><text:span text:style-name="T3">statement</text:span></text:span><text:span text:style-name="T3">.</text:span></text:p>
        </text:list-item>
      </text:list>
      <text:p text:style-name="P9"><text:span text:style-name="T4">Maka, </text:span><text:span text:style-name="Source_20_Text"><text:span text:style-name="T3">if (x) </text:span></text:span><text:span text:style-name="Source_20_Text"><text:span text:style-name="T5">{...}</text:span></text:span><text:span text:style-name="T4"> </text:span><text:span text:style-name="Strong_20_Emphasis"><text:span text:style-name="T4">valid</text:span></text:span><text:span text:style-name="T4"> karena sesuai grammar (</text:span><text:span text:style-name="Source_20_Text"><text:span text:style-name="T3">"if" "(" &lt;expression&gt; ")" &lt;</text:span></text:span><text:span text:style-name="Source_20_Text"><text:span text:style-name="T5">statement&gt;</text:span></text:span><text:span text:style-name="T4">). </text:span><text:span text:style-name="Source_20_Text"><text:span text:style-name="T3">if x </text:span></text:span><text:span text:style-name="Source_20_Text"><text:span text:style-name="T5">{...}</text:span></text:span><text:span text:style-name="T4"> </text:span><text:span text:style-name="Strong_20_Emphasis"><text:span text:style-name="T4">error</text:span></text:span><text:span text:style-name="T4"> karena tidak ada tanda kurung, sehingga tidak cocok dengan aturan grammar. </text:span><text:span text:style-name="T6">Jadi, untuk yang valid itu pasti akan mem</text:span><text:span text:style-name="T7">e</text:span><text:span text:style-name="T6">nuhi, setelah “if” dicek dan </text:span><text:span text:style-name="T7">cocok</text:span><text:span text:style-name="T6">, lalu akan mengecek token/karakter selanjutnya, yang harus berupa “(“. Yang valid, </text:span><text:span text:style-name="T7">ini</text:span><text:span text:style-name="T6"> akan </text:span><text:span text:style-name="T7">cocok, karena benar dikasih “(“,</text:span><text:span text:style-name="T6"> dan lanjut ke &lt;expresssion&gt;, sedangkan </text:span><text:span text:style-name="Source_20_Text"><text:span text:style-name="T3">if x </text:span></text:span><text:span text:style-name="Source_20_Text"><text:span text:style-name="T5">{…} </text:span></text:span><text:span text:style-name="T6">tidak valid, </text:span><text:span text:style-name="T7">tidak cocok di pengecekkan “(“ yang dikasih sutau expression, bukan “(“</text:span></text:p>
      <text:list text:style-name="L3">
        <text:list-item>
          <text:p text:style-name="P10">if (x) <text:span text:style-name="T8">{...}</text:span></text:p>
          <text:list>
            <text:list-item>
              <text:p text:style-name="P10">“if” cocok</text:p>
            </text:list-item>
            <text:list-item>
              <text:p text:style-name="P10">“(“ cocok</text:p>
            </text:list-item>
            <text:list-item>
              <text:p text:style-name="P10">&lt;expression&gt;, x, cocok</text:p>
            </text:list-item>
            <text:list-item>
              <text:p text:style-name="P10">“)” cocok</text:p>
            </text:list-item>
            <text:list-item>
              <text:p text:style-name="P10">&lt;statement&gt;, <text:span text:style-name="T8">cocok</text:span></text:p>
            </text:list-item>
          </text:list>
        </text:list-item>
        <text:list-item>
          <text:p text:style-name="P10">if x <text:span text:style-name="T8">{...}</text:span></text:p>
          <text:list>
            <text:list-item>
              <text:p text:style-name="P10">“if” cocok.</text:p>
            </text:list-item>
            <text:list-item>
              <text:p text:style-name="P10"><text:soft-page-break/>“(“ tidak cocok, dikasih identifier x instead of “(“, <text:span text:style-name="T8">sehingga parsing gagal, dan compiler akan kasih error expected ‘(‘ after ‘if’</text:span></text:p>
            </text:list-item>
          </text:list>
        </text:list-item>
      </text:list>
      <text:p text:style-name="P11">Jadi, if x itu error karena sintaks nya tidak sesuai dengan aturan grammar nya</text:p>
      <text:h text:style-name="Heading_20_2" text:outline-level="2">Pertanyaan 2 <text:span text:style-name="T9">dan 3</text:span></text:h>
      <text:p text:style-name="P4">Grammar BNF table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2">Struktur</text:p>
          </table:table-cell>
          <table:table-cell table:style-name="Table1.A1" office:value-type="string">
            <text:p text:style-name="P12">Grammar BNF</text:p>
          </table:table-cell>
          <table:table-cell table:style-name="Table1.A1" office:value-type="string">
            <text:p text:style-name="P12">Contoh Valid</text:p>
          </table:table-cell>
          <table:table-cell table:style-name="Table1.D1" office:value-type="string">
            <text:p text:style-name="P12">Contoh Error</text:p>
          </table:table-cell>
        </table:table-row>
        <table:table-row>
          <table:table-cell table:style-name="Table1.A2" office:value-type="string">
            <text:p text:style-name="P12">While</text:p>
          </table:table-cell>
          <table:table-cell table:style-name="Table1.A2" office:value-type="string">
            <text:p text:style-name="P13">&lt;while-statement&gt; ::= "while" "(" &lt;expression&gt; ")" &lt;statement&gt;</text:p>
          </table:table-cell>
          <table:table-cell table:style-name="Table1.A2" office:value-type="string">
            <text:p text:style-name="P13">while (x &lt; 5) { x++; }</text:p>
          </table:table-cell>
          <table:table-cell table:style-name="Table1.D2" office:value-type="string">
            <text:p text:style-name="P13">while x &lt; 5 { x++; }</text:p>
          </table:table-cell>
        </table:table-row>
        <table:table-row>
          <table:table-cell table:style-name="Table1.A2" office:value-type="string">
            <text:p text:style-name="P12">For</text:p>
          </table:table-cell>
          <table:table-cell table:style-name="Table1.A2" office:value-type="string">
            <text:p text:style-name="P13">&lt;for-statement&gt; ::= "for" "(" &lt;init&gt; ";" &lt;condition&gt; ";" &lt;increment&gt; ")" &lt;statement&gt;</text:p>
          </table:table-cell>
          <table:table-cell table:style-name="Table1.A2" office:value-type="string">
            <text:p text:style-name="P13">for (int i=0; i&lt;10; i++) { printf("%d", i); }</text:p>
          </table:table-cell>
          <table:table-cell table:style-name="Table1.D2" office:value-type="string">
            <text:p text:style-name="P13">for i=0; i&lt;10; i++ { printf("%d", i); }</text:p>
          </table:table-cell>
        </table:table-row>
        <table:table-row>
          <table:table-cell table:style-name="Table1.A2" office:value-type="string">
            <text:p text:style-name="P12">Deklarasi Variable</text:p>
          </table:table-cell>
          <table:table-cell table:style-name="Table1.A2" office:value-type="string">
            <text:p text:style-name="P14">&lt;declaration&gt; ::= &lt;type&gt; &lt;identifier&gt; ";"<text:line-break/>&lt;type&gt; ::= "int" | "float" | "char"</text:p>
          </table:table-cell>
          <table:table-cell table:style-name="Table1.A2" office:value-type="string">
            <text:p text:style-name="P14">int a;<text:line-break/>float b;<text:line-break/>char c;</text:p>
          </table:table-cell>
          <table:table-cell table:style-name="Table1.D2" office:value-type="string">
            <text:p text:style-name="P14">int;<text:line-break/>float;<text:line-break/>char;</text:p>
          </table:table-cell>
        </table:table-row>
      </table:table>
      <text:p text:style-name="P3"/>
      <text:h text:style-name="Heading_20_2" text:outline-level="2">Pertanyaan <text:span text:style-name="T9">4</text:span></text:h>
      <text:p text:style-name="P15">CFG/BNF memberi aturan formal tentang bagaimana syntax harus ditulis. Dengan CFG/BNF, kita bisa tahu kenapa kode tertentu valid atau error: biasanya karena melanggar struktur grammar (misalnya tanda kurung hilang, identifier tidak ada, dll). Jadi, grammar membantu memahami logika compiler dalam membaca kode, serta membantu programmer menulis kode yang benar.</text:p>
      <text:p text:style-name="P15"/>
      <text:h text:style-name="P2" text:outline-level="1">Tugas <text:span text:style-name="T2">2</text:span></text:h>
      <text:h text:style-name="P16" text:outline-level="2">BNF C</text:h>
      <text:h text:style-name="P17" text:outline-level="3">Grammar</text:h>
      <text:p text:style-name="P18"><text:span text:style-name="T10">&lt;program&gt; ::= &lt;declaration_list&gt;</text:span> </text:p>
      <text:section text:style-name="Sect1" text:name="WACViewPanel_ClipboardElement">
        <text:p text:style-name="P19"><text:soft-page-break/><text:span text:style-name="T10">&lt;declaration_list&gt; ::= &lt;declaration&gt; | &lt;declaration&gt; &lt;declaration_list&gt;</text:span> </text:p>
        <text:p text:style-name="P19"><text:span text:style-name="T10">&lt;declaration&gt; ::= &lt;function_declaration&gt; | &lt;variable_declaration&gt;</text:span> </text:p>
        <text:p text:style-name="P19"><text:span text:style-name="T10">&lt;function_declaration&gt; ::= &lt;type_specifier&gt; &lt;identifier&gt; "(" &lt;parameter_list&gt; ")" &lt;compound_statement&gt;</text:span> </text:p>
        <text:p text:style-name="P19"><text:span text:style-name="T10">&lt;parameter_list&gt; ::= &lt;parameter&gt; | &lt;parameter&gt; "," &lt;parameter_list&gt; | ε</text:span> </text:p>
        <text:p text:style-name="P19"><text:span text:style-name="T10">&lt;parameter&gt; ::= &lt;type_specifier&gt; &lt;identifier&gt;</text:span> </text:p>
        <text:p text:style-name="P19"><text:span text:style-name="T10">&lt;variable_declaration&gt; ::= &lt;type_specifier&gt; &lt;identifier&gt; ";"</text:span> </text:p>
        <text:p text:style-name="P19"><text:span text:style-name="T10">&lt;type_specifier&gt; ::= "int" | "float" | "char" | "void"</text:span> </text:p>
        <text:p text:style-name="P19"><text:span text:style-name="T10">&lt;compound_statement&gt; ::= "{" &lt;statement_list&gt; "}"</text:span> </text:p>
        <text:p text:style-name="P19"><text:span text:style-name="T10">&lt;statement_list&gt; ::= &lt;statement&gt; | &lt;statement&gt; &lt;statement_list&gt; | ε</text:span> </text:p>
        <text:p text:style-name="P19"><text:span text:style-name="T10">&lt;statement&gt; ::= &lt;expression_statement&gt; | &lt;return_statement&gt;</text:span> </text:p>
        <text:p text:style-name="P19"><text:span text:style-name="T10">&lt;expression_statement&gt; ::= &lt;expression&gt; ";"</text:span> </text:p>
        <text:p text:style-name="P19"><text:span text:style-name="T10">&lt;return_statement&gt; ::= "return" &lt;expression&gt; ";"</text:span> </text:p>
        <text:p text:style-name="P19"><text:span text:style-name="T10">&lt;expression&gt; ::= &lt;assignment_expression&gt;</text:span> </text:p>
        <text:p text:style-name="P19"><text:span text:style-name="T10">&lt;assignment_expression&gt; ::= &lt;identifier&gt; | &lt;identifier&gt; "=" &lt;arithmetic_expression&gt;</text:span> </text:p>
        <text:p text:style-name="P19"><text:span text:style-name="T10">&lt;arithmetic_expression&gt; ::= &lt;term&gt; | &lt;arithmetic_expression&gt; "+" &lt;term&gt; | &lt;arithmetic_expression&gt; "-" &lt;term&gt;</text:span> </text:p>
        <text:p text:style-name="P19"><text:span text:style-name="T10">&lt;term&gt; ::= &lt;factor&gt; | &lt;term&gt; "*" &lt;factor&gt; | &lt;term&gt; "/" &lt;factor&gt;</text:span> </text:p>
        <text:p text:style-name="P19"><text:span text:style-name="T10">&lt;factor&gt; ::= &lt;identifier&gt; | &lt;number&gt; | "(" &lt;arithmetic_expression&gt; ")"</text:span> </text:p>
        <text:p text:style-name="P19"><text:span text:style-name="T10">&lt;identifier&gt; ::= &lt;letter&gt; | &lt;identifier&gt; &lt;letter&gt; | &lt;identifier&gt; &lt;digit&gt;</text:span> </text:p>
        <text:p text:style-name="P19"><text:span text:style-name="T10">&lt;letter&gt; ::= "a" | "b" | ... | "z" | "A" | "B" | ... | "Z"</text:span> </text:p>
        <text:p text:style-name="P19"><text:span text:style-name="T10">&lt;digit&gt; ::= "0" | "1" | "2" | "3" | "4" | "5" | "6" | "7" | "8" | "9"</text:span> </text:p>
        <text:p text:style-name="P19"><text:span text:style-name="T10">&lt;number&gt; ::= &lt;digit&gt; | &lt;number&gt; &lt;digit&gt;</text:span> </text:p>
      </text:section>
      <text:p text:style-name="Text_20_body"/>
      <text:h text:style-name="P17" text:outline-level="3">Contoh Program yang Digunakan</text:h>
      <text:p text:style-name="P20"><text:bookmark text:name="WACViewPanel_ClipboardElement"/><text:span text:style-name="T10">int add(int a, int b) {</text:span> </text:p>
      <text:section text:style-name="Sect1" text:name="Section1">
        <text:p text:style-name="P21"><text:soft-page-break/>    <text:span text:style-name="T11">return a + b;</text:span><text:span text:style-name="T12"> </text:span></text:p>
        <text:p text:style-name="P22"><text:span text:style-name="T10">}</text:span> </text:p>
      </text:section>
      <text:p text:style-name="P23"/>
      <text:h text:style-name="P17" text:outline-level="3">Derivation</text:h>
      <text:p text:style-name="P24"><text:bookmark text:name="WACViewPanel_ClipboardElement Copy 1"/><text:span text:style-name="T10">&lt;program&gt;</text:span> </text:p>
      <text:section text:style-name="Sect1" text:name="Section2">
        <text:p text:style-name="P25">⟹ <text:span text:style-name="T11">&lt;declaration_list&gt;</text:span><text:span text:style-name="T12"> </text:span></text:p>
        <text:p text:style-name="P25">⟹ <text:span text:style-name="T11">&lt;declaration&gt;</text:span><text:span text:style-name="T12"> </text:span></text:p>
        <text:p text:style-name="P25">⟹ <text:span text:style-name="T11">&lt;function_declaration&gt;</text:span><text:span text:style-name="T12"> </text:span></text:p>
        <text:p text:style-name="P25">⟹ <text:span text:style-name="T11">&lt;type_specifier&gt; &lt;identifier&gt; "(" &lt;parameter_list&gt; ")" &lt;compound_statement&gt;</text:span><text:span text:style-name="T12"> </text:span></text:p>
        <text:p text:style-name="P25">⟹ <text:span text:style-name="T11">"int" &lt;identifier&gt; "(" &lt;parameter_list&gt; ")" &lt;compound_statement&gt;</text:span><text:span text:style-name="T12"> </text:span></text:p>
        <text:p text:style-name="P25">⟹ <text:span text:style-name="T11">"int" "add" "(" &lt;parameter_list&gt; ")" &lt;compound_statement&gt;</text:span><text:span text:style-name="T12"> </text:span></text:p>
        <text:p text:style-name="P25">⟹ <text:span text:style-name="T11">"int" "add" "(" &lt;parameter&gt; "," &lt;parameter_list&gt; ")" &lt;compound_statement&gt;</text:span><text:span text:style-name="T12"> </text:span></text:p>
        <text:p text:style-name="P25">⟹ <text:span text:style-name="T11">"int" "add" "(" &lt;type_specifier&gt; &lt;identifier&gt; "," &lt;parameter_list&gt; ")" &lt;compound_statement&gt;</text:span><text:span text:style-name="T12"> </text:span></text:p>
        <text:p text:style-name="P25">⟹ <text:span text:style-name="T11">"int" "add" "(" "int" &lt;identifier&gt; "," &lt;parameter_list&gt; ")" &lt;compound_statement&gt;</text:span><text:span text:style-name="T12"> </text:span></text:p>
        <text:p text:style-name="P25">⟹ <text:span text:style-name="T11">"int" "add" "(" "int" "a" "," &lt;parameter_list&gt; ")" &lt;compound_statement&gt;</text:span><text:span text:style-name="T12"> </text:span></text:p>
        <text:p text:style-name="P25">⟹ <text:span text:style-name="T11">"int" "add" "(" "int" "a" "," &lt;parameter&gt; ")" &lt;compound_statement&gt;</text:span><text:span text:style-name="T12"> </text:span></text:p>
        <text:p text:style-name="P25">⟹ <text:span text:style-name="T11">"int" "add" "(" "int" "a" "," &lt;type_specifier&gt; &lt;identifier&gt; ")" &lt;compound_statement&gt;</text:span><text:span text:style-name="T12"> </text:span></text:p>
        <text:p text:style-name="P25">⟹ <text:span text:style-name="T11">"int" "add" "(" "int" "a" "," "int" &lt;identifier&gt; ")" &lt;compound_statement&gt;</text:span><text:span text:style-name="T12"> </text:span></text:p>
        <text:p text:style-name="P25">⟹ <text:span text:style-name="T11">"int" "add" "(" "int" "a" "," "int" "b" ")" &lt;compound_statement&gt;</text:span><text:span text:style-name="T12"> </text:span></text:p>
        <text:p text:style-name="P25">⟹ <text:span text:style-name="T11">"int" "add" "(" "int" "a" "," "int" "b" ")" "{" &lt;statement_list&gt; "}"</text:span><text:span text:style-name="T12"> </text:span></text:p>
        <text:p text:style-name="P25">⟹ <text:span text:style-name="T11">"int" "add" "(" "int" "a" "," "int" "b" ")" "{" &lt;statement&gt; "}"</text:span><text:span text:style-name="T12"> </text:span></text:p>
        <text:p text:style-name="P25">⟹ <text:span text:style-name="T11">"int" "add" "(" "int" "a" "," "int" "b" ")" "{" &lt;return_statement&gt; "}"</text:span><text:span text:style-name="T12"> </text:span></text:p>
        <text:p text:style-name="P25"><text:soft-page-break/>⟹ <text:span text:style-name="T11">"int" "add" "(" "int" "a" "," "int" "b" ")" "{" "return" &lt;expression&gt; ";" "}"</text:span><text:span text:style-name="T12"> </text:span></text:p>
        <text:p text:style-name="P25">⟹ <text:span text:style-name="T11">"int" "add" "(" "int" "a" "," "int" "b" ")" "{" "return" &lt;assignment_expression&gt; ";" "}"</text:span><text:span text:style-name="T12"> </text:span></text:p>
        <text:p text:style-name="P25">⟹ <text:span text:style-name="T11">"int" "add" "(" "int" "a" "," "int" "b" ")" "{" "return" &lt;arithmetic_expression&gt; ";" "}"</text:span><text:span text:style-name="T12"> </text:span></text:p>
        <text:p text:style-name="P25">⟹ <text:span text:style-name="T11">"int" "add" "(" "int" "a" "," "int" "b" ")" "{" "return" &lt;arithmetic_expression&gt; "+" &lt;term&gt; ";" "}"</text:span><text:span text:style-name="T12"> </text:span></text:p>
        <text:p text:style-name="P25">⟹ <text:span text:style-name="T11">"int" "add" "(" "int" "a" "," "int" "b" ")" "{" "return" &lt;term&gt; "+" &lt;term&gt; ";" "}"</text:span><text:span text:style-name="T12"> </text:span></text:p>
        <text:p text:style-name="P25">⟹ <text:span text:style-name="T11">"int" "add" "(" "int" "a" "," "int" "b" ")" "{" "return" &lt;factor&gt; "+" &lt;term&gt; ";" "}"</text:span><text:span text:style-name="T12"> </text:span></text:p>
        <text:p text:style-name="P25">⟹ <text:span text:style-name="T11">"int" "add" "(" "int" "a" "," "int" "b" ")" "{" "return" &lt;identifier&gt; "+" &lt;term&gt; ";" "}"</text:span><text:span text:style-name="T12"> </text:span></text:p>
        <text:p text:style-name="P25">⟹ <text:span text:style-name="T11">"int" "add" "(" "int" "a" "," "int" "b" ")" "{" "return" "a" "+" &lt;term&gt; ";" "}"</text:span><text:span text:style-name="T12"> </text:span></text:p>
        <text:p text:style-name="P25">⟹ <text:span text:style-name="T11">"int" "add" "(" "int" "a" "," "int" "b" ")" "{" "return" "a" "+" &lt;factor&gt; ";" "}"</text:span><text:span text:style-name="T12"> </text:span></text:p>
        <text:p text:style-name="P25">⟹ <text:span text:style-name="T11">"int" "add" "(" "int" "a" "," "int" "b" ")" "{" "return" "a" "+" &lt;identifier&gt; ";" "}"</text:span><text:span text:style-name="T12"> </text:span></text:p>
        <text:p text:style-name="P25">⟹ <text:span text:style-name="T11">"int" "add" "(" "int" "a" "," "int" "b" ")" "{" "return" "a" "+" "b" ";" "}"</text:span><text:span text:style-name="T12"> </text:span></text:p>
      </text:section>
      <text:p text:style-name="P23"/>
      <text:h text:style-name="P17" text:outline-level="3">Parse Tree</text:h>
      <text:p text:style-name="P26"><text:bookmark text:name="WACViewPanel_ClipboardElement Copy 2"/><text:span text:style-name="T13">&lt;program&gt;</text:span> </text:p>
      <text:section text:style-name="Sect1" text:name="Section3">
        <text:p text:style-name="P27">                        <text:span text:style-name="T14">|</text:span><text:span text:style-name="T12"> </text:span></text:p>
        <text:p text:style-name="P27">                <text:span text:style-name="T14">&lt;declaration_list&gt;</text:span><text:span text:style-name="T12"> </text:span></text:p>
        <text:p text:style-name="P27">                        <text:span text:style-name="T14">|</text:span><text:span text:style-name="T12"> </text:span></text:p>
        <text:p text:style-name="P27">                  <text:span text:style-name="T14">&lt;declaration&gt;</text:span><text:span text:style-name="T12"> </text:span></text:p>
        <text:p text:style-name="P27">                        <text:span text:style-name="T14">|</text:span><text:span text:style-name="T12"> </text:span></text:p>
        <text:p text:style-name="P27">              <text:span text:style-name="T14">&lt;function_declaration&gt;</text:span><text:span text:style-name="T12"> </text:span></text:p>
        <text:p text:style-name="P28">              <text:span text:style-name="T14">/    <text:s text:c="16"/>|  <text:s text:c="3"/>   |    <text:s text:c="8"/>|    <text:s text:c="9"/>|  <text:s text:c="14"/>\</text:span><text:span text:style-name="T12"> </text:span></text:p>
        <text:p text:style-name="P27">    <text:span text:style-name="T14">&lt;type_specifier&gt; &lt;id&gt; "(" &lt;param_list&gt; ")" &lt;compound_statement&gt;</text:span><text:span text:style-name="T12"> </text:span></text:p>
        <text:p text:style-name="P27"><text:soft-page-break/>            <text:span text:style-name="T14">|       <text:s text:c="30"/></text:span><text:span text:style-name="T12">  </text:span><text:span text:style-name="T14">|        </text:span><text:span text:style-name="T12">   </text:span><text:span text:style-name="T14">|                 |</text:span><text:span text:style-name="T12"> </text:span></text:p>
        <text:p text:style-name="P27">          <text:span text:style-name="T14">"int"     "add"    &lt;param&gt;,&lt;param&gt;      "{" &lt;stmt_list&gt; "}"</text:span><text:span text:style-name="T12"> </text:span></text:p>
        <text:p text:style-name="P27">                        <text:span text:style-name="T14">/  \    <text:tab/> <text:s text:c="4"/>/  \           |</text:span><text:span text:style-name="T12"> </text:span></text:p>
        <text:p text:style-name="P27">                    <text:span text:style-name="T14">&lt;type&gt;&lt;id&gt; &lt;type&gt;&lt;id&gt;            &lt;statement&gt;</text:span><text:span text:style-name="T12"> </text:span></text:p>
        <text:p text:style-name="P27">                      <text:span text:style-name="T14">|   <text:s text:c="6"/>|      <text:s/>|  <text:s text:c="8"/></text:span><text:span text:style-name="T12"><text:s/></text:span><text:span text:style-name="T14">|               <text:s text:c="13"/>    |</text:span><text:span text:style-name="T12"> </text:span></text:p>
        <text:p text:style-name="P27">                    <text:span text:style-name="T14">"int" "a"  <text:s text:c="3"/>"int" <text:s text:c="3"/>"b"           &lt;return_statement&gt;</text:span><text:span text:style-name="T12"> </text:span></text:p>
        <text:p text:style-name="P27">                                                          <text:s text:c="11"/><text:span text:style-name="T14">|</text:span><text:span text:style-name="T12"> </text:span></text:p>
        <text:p text:style-name="P27">                                                   <text:span text:style-name="T14">"return" &lt;expr&gt; ";"</text:span><text:span text:style-name="T12"> </text:span></text:p>
        <text:p text:style-name="P27">                                                           <text:span text:style-name="T14">|</text:span><text:span text:style-name="T12"> </text:span></text:p>
        <text:p text:style-name="P27">                                                   <text:span text:style-name="T14">&lt;arith_expression&gt;</text:span><text:span text:style-name="T12"> </text:span></text:p>
        <text:p text:style-name="P27">                                                          <text:span text:style-name="T14">|</text:span><text:span text:style-name="T12"> </text:span></text:p>
        <text:p text:style-name="P27">                                                   <text:span text:style-name="T14">&lt;term&gt; "+" &lt;term&gt;</text:span><text:span text:style-name="T12"> </text:span></text:p>
        <text:p text:style-name="P27">                                                     <text:span text:style-name="T14">|       </text:span><text:span text:style-name="T12">  </text:span><text:span text:style-name="T14">|</text:span><text:span text:style-name="T12"> </text:span></text:p>
        <text:p text:style-name="P27">                                                 <text:span text:style-name="T14">&lt;factor&gt;  &lt;factor&gt;</text:span><text:span text:style-name="T12"> </text:span></text:p>
        <text:p text:style-name="P27">                                                     <text:span text:style-name="T14">|         |</text:span><text:span text:style-name="T12"> </text:span></text:p>
        <text:p text:style-name="P27">                                                   <text:span text:style-name="T14">&lt;id&gt;      &lt;id&gt;</text:span><text:span text:style-name="T12"> </text:span></text:p>
        <text:p text:style-name="P27">                                                     <text:span text:style-name="T14">|         |</text:span><text:span text:style-name="T12"> </text:span></text:p>
        <text:p text:style-name="P27">                                                    <text:span text:style-name="T14">"a"      "b"</text:span><text:span text:style-name="T12"> </text:span></text:p>
      </text:section>
      <text:p text:style-name="P23"/>
      <text:h text:style-name="P17" text:outline-level="3">AST</text:h>
      <text:p text:style-name="P26"><text:bookmark text:name="WACViewPanel_ClipboardElement Copy 3"/><text:span text:style-name="T13">Program</text:span> </text:p>
      <text:section text:style-name="Sect1" text:name="Section4">
        <text:p text:style-name="P27">└── <text:span text:style-name="T14">FunctionDeclaration</text:span><text:span text:style-name="T12"> </text:span></text:p>
        <text:p text:style-name="P27">    ├── <text:span text:style-name="T14">ReturnType: int</text:span><text:span text:style-name="T12"> </text:span></text:p>
        <text:p text:style-name="P27">    ├── <text:span text:style-name="T14">Name: add</text:span><text:span text:style-name="T12"> </text:span></text:p>
        <text:p text:style-name="P27">    ├── <text:span text:style-name="T14">Parameters</text:span><text:span text:style-name="T12"> </text:span></text:p>
        <text:p text:style-name="P27">    │   ├── <text:span text:style-name="T14">Parameter(type: int, name: a)</text:span><text:span text:style-name="T12"> </text:span></text:p>
        <text:p text:style-name="P27">    │   └── <text:span text:style-name="T14">Parameter(type: int, name: b)</text:span><text:span text:style-name="T12"> </text:span></text:p>
        <text:p text:style-name="P27">    └── <text:span text:style-name="T14">Body</text:span><text:span text:style-name="T12"> </text:span></text:p>
        <text:p text:style-name="P27">        └── <text:span text:style-name="T14">ReturnStatement</text:span><text:span text:style-name="T12"> </text:span></text:p>
        <text:p text:style-name="P27">            └── <text:span text:style-name="T14">BinaryExpression</text:span><text:span text:style-name="T12"> </text:span></text:p>
        <text:p text:style-name="P27"><text:soft-page-break/>                ├── <text:span text:style-name="T14">Operator: +</text:span><text:span text:style-name="T12"> </text:span></text:p>
        <text:p text:style-name="P27">                ├── <text:span text:style-name="T14">Left: Identifier(a)</text:span><text:span text:style-name="T12"> </text:span></text:p>
        <text:p text:style-name="P27">                └── <text:span text:style-name="T14">Right: Identifier(b)</text:span><text:span text:style-name="T12"> </text:span></text:p>
      </text:section>
      <text:p text:style-name="P23"/>
      <text:h text:style-name="P29" text:outline-level="3">Dokumentasi Proses Pembentukan Grammar dan Alasan Desain</text:h>
      <text:h text:style-name="P30" text:outline-level="3"><text:bookmark text:name="WACViewPanel_ClipboardElement Copy 4"/><text:span text:style-name="T15">Sumber dan Metodologi Grammar:</text:span><text:span text:style-name="T16"> </text:span></text:h>
      <text:section text:style-name="Sect1" text:name="Section5">
        <text:list text:style-name="L4">
          <text:list-item>
            <text:p text:style-name="P31"><text:span text:style-name="T17">Referensi: ISO C11 Standard (ISO/IEC 9899:2011) dan GCC parser implementation</text:span> </text:p>
          </text:list-item>
        </text:list>
        <text:list text:style-name="L5">
          <text:list-item>
            <text:p text:style-name="P32"><text:span text:style-name="T17">Alasan Penyederhanaan: Grammar C penuh (800+ rules) terlalu kompleks untuk derivation manual</text:span> </text:p>
          </text:list-item>
        </text:list>
        <text:list text:style-name="L6">
          <text:list-item>
            <text:p text:style-name="P33"><text:span text:style-name="T17">Focus Area: Function definition, variable declaration, expressions, statements</text:span> </text:p>
          </text:list-item>
        </text:list>
        <text:list text:style-name="L7">
          <text:list-item>
            <text:p text:style-name="P34"><text:span text:style-name="T17">Kompleksitas yang Dihilangkan: Preprocessor, advanced types, control flow, storage classes</text:span> </text:p>
          </text:list-item>
        </text:list>
        <text:p text:style-name="P35"><text:span text:style-name="T18">Konversi ISO Standard -&gt; BNF:</text:span> </text:p>
        <text:list text:style-name="L8">
          <text:list-item>
            <text:p text:style-name="P36"><text:span text:style-name="T17">Precedence Preservation: Tetap mengikuti C standard (15 levels)</text:span> </text:p>
          </text:list-item>
        </text:list>
        <text:list text:style-name="L9">
          <text:list-item>
            <text:p text:style-name="P37"><text:span text:style-name="T17">Left Recursion Elimination: Dikonversi untuk top-down parsing</text:span> </text:p>
          </text:list-item>
        </text:list>
        <text:list text:style-name="L10">
          <text:list-item>
            <text:p text:style-name="P38"><text:span text:style-name="T17">Ambiguity Resolution: Dangling else dihindari dengan subset selection</text:span> </text:p>
          </text:list-item>
        </text:list>
        <text:list text:style-name="L11">
          <text:list-item>
            <text:p text:style-name="P39"><text:span text:style-name="T17">Context Sensitivity: Type checking diasumsikan ditangani semantic analyzer</text:span> </text:p>
          </text:list-item>
        </text:list>
        <text:p text:style-name="P35"><text:span text:style-name="T18">Token Dependencies:</text:span> </text:p>
        <text:list text:style-name="L12">
          <text:list-item>
            <text:p text:style-name="P40"><text:span text:style-name="T17">Lexical Analysis: Lexer memproduksi IDENTIFIER, NUMBER, KEYWORD tokens</text:span> </text:p>
          </text:list-item>
        </text:list>
        <text:list text:style-name="L13">
          <text:list-item>
            <text:p text:style-name="P41"><text:span text:style-name="T17">Whitespace Handling: Lexer menghilangkan whitespace dan comments</text:span> </text:p>
          </text:list-item>
        </text:list>
        <text:list text:style-name="L14">
          <text:list-item>
            <text:p text:style-name="P42"><text:span text:style-name="T17">Grammar Assumptions: Parser menerima token stream, bukan character stream</text:span> </text:p>
          </text:list-item>
        </text:list>
        <text:p text:style-name="P35"><text:span text:style-name="T18">Grammar BNF Lengkap:</text:span> </text:p>
        <text:list text:style-name="L15">
          <text:list-item>
            <text:p text:style-name="P43"><text:span text:style-name="T17">18 Non-terminals dengan hierarki yang jelas</text:span> </text:p>
          </text:list-item>
        </text:list>
        <text:list text:style-name="L16">
          <text:list-item>
            <text:p text:style-name="P44"><text:span text:style-name="T17">25 Terminals termasuk operators dan keywords</text:span> </text:p>
          </text:list-item>
        </text:list>
        <text:list text:style-name="L17">
          <text:list-item>
            <text:p text:style-name="P45"><text:span text:style-name="T17">28 Production Rules total</text:span> </text:p>
          </text:list-item>
        </text:list>
        <text:list text:style-name="L18">
          <text:list-item>
            <text:p text:style-name="P46"><text:span text:style-name="T17">Precedence Table sesuai C Standard dengan 15 levels</text:span> </text:p>
          </text:list-item>
        </text:list>
        <text:p text:style-name="P35"><text:span text:style-name="T18">Tokenisasi Detail:</text:span> </text:p>
        <text:list text:style-name="L19">
          <text:list-item>
            <text:p text:style-name="P47"><text:span text:style-name="T17">5 Kategori Token: Keywords, Identifiers, Literals, Operators, Delimiters</text:span> </text:p>
          </text:list-item>
        </text:list>
        <text:list text:style-name="L20">
          <text:list-item>
            <text:p text:style-name="P48"><text:span text:style-name="T17">Lexer Responsibilities: Whitespace removal, comment handling, token classification</text:span> </text:p>
          </text:list-item>
        </text:list>
        <text:list text:style-name="L21">
          <text:list-item>
            <text:p text:style-name="P49"><text:span text:style-name="T17">Multi-character Operators: </text:span><text:span text:style-name="T19">&lt;=</text:span><text:span text:style-name="T17">, </text:span><text:span text:style-name="T19">&gt;=</text:span><text:span text:style-name="T17">, </text:span><text:span text:style-name="T19">==</text:span><text:span text:style-name="T17">, </text:span><text:span text:style-name="T19">!=</text:span><text:span text:style-name="T17">, </text:span><text:span text:style-name="T19">&amp;&amp;</text:span><text:span text:style-name="T17">, </text:span><text:span text:style-name="T19">||</text:span> </text:p>
          </text:list-item>
        </text:list>
      </text:section>
      <text:p text:style-name="P23"/>
      <text:h text:style-name="P16" text:outline-level="2"><text:soft-page-break/>EBNF Python</text:h>
      <text:h text:style-name="P17" text:outline-level="3">Grammar</text:h>
      <text:p text:style-name="P50"><text:bookmark text:name="WACViewPanel_ClipboardElement Copy 5"/><text:span text:style-name="T20">Terminals: NAME, NUMBER, STRING, NEWLINE, INDENT, DEDENT, EOF Symbols (literal): "def" ":" "(" ")" "," "=" "+" "-" "*" "/" "//" "%" "**" "return"</text:span> </text:p>
      <text:section text:style-name="Sect1" text:name="Section6">
        <text:p text:style-name="P51"><text:span text:style-name="T20">program ::= { statement } EOF</text:span> </text:p>
        <text:p text:style-name="P51"><text:span text:style-name="T20">statement ::= simple_stmt | compound_stmt</text:span> </text:p>
        <text:p text:style-name="P51"><text:span text:style-name="T20">simple_stmt ::= (assign_stmt | return_stmt | expr_stmt) NEWLINE</text:span> </text:p>
        <text:p text:style-name="P51"><text:span text:style-name="T20">compound_stmt ::= funcdef</text:span> </text:p>
        <text:p text:style-name="P51"><text:span text:style-name="T20">funcdef ::= "def" NAME "(" [ param_list ] ")" ":" NEWLINE INDENT { statement } DEDENT</text:span> </text:p>
        <text:p text:style-name="P51"><text:span text:style-name="T20">param_list ::= param { "," param } param ::= NAME</text:span> </text:p>
        <text:p text:style-name="P51"><text:span text:style-name="T20">assign_stmt ::= target "=" expr target ::= NAME</text:span> </text:p>
        <text:p text:style-name="P51"><text:span text:style-name="T20">expr_stmt ::= expr</text:span> </text:p>
        <text:p text:style-name="P51"><text:span text:style-name="T20">return_stmt ::= "return" [ expr ]</text:span> </text:p>
        <text:p text:style-name="P51"><text:span text:style-name="T20">expr ::= disjunction</text:span> </text:p>
        <text:p text:style-name="P51"><text:span text:style-name="T20">disjunction ::= conjunction { "or" conjunction } conjunction ::= inversion { "and" inversion } inversion ::= "not" inversion | comparison</text:span> </text:p>
        <text:p text:style-name="P51"><text:span text:style-name="T20">comparison ::= arith { comp_op arith } comp_op ::= "==" | "!=" | "&lt;" | "&gt;" | "&lt;=" | "&gt;=" | "in" | "is"</text:span> </text:p>
        <text:p text:style-name="P51"><text:soft-page-break/><text:span text:style-name="T20">arith ::= term { ("+" | "-") term } term ::= factor { ("*" | "/" | "//" | "%") factor } factor ::= ("+" | "-" | "~") factor | power power ::= atom [ "**" factor ]</text:span> </text:p>
        <text:p text:style-name="P51"><text:span text:style-name="T20">atom ::= NAME | NUMBER | STRING | "(" expr ")" | "[" [ expr_list ] "]"</text:span> </text:p>
        <text:p text:style-name="P51"><text:span text:style-name="T20">expr_list ::= expr { "," expr } [ "," ]</text:span> </text:p>
      </text:section>
      <text:p text:style-name="P23"/>
      <text:h text:style-name="P17" text:outline-level="3">Contoh Program yang Akan Digunakan</text:h>
      <text:p text:style-name="P52"><text:bookmark text:name="WACViewPanel_ClipboardElement Copy 6"/><text:span text:style-name="T20">def add(a, b):</text:span> </text:p>
      <text:section text:style-name="Sect1" text:name="Section7">
        <text:p text:style-name="P53">    <text:span text:style-name="T21">c = a + b</text:span><text:span text:style-name="T12"> </text:span></text:p>
        <text:p text:style-name="P53">    <text:span text:style-name="T21">return c</text:span><text:span text:style-name="T12"> </text:span></text:p>
      </text:section>
      <text:p text:style-name="P23"/>
      <text:h text:style-name="P17" text:outline-level="3">Derivation</text:h>
      <text:list text:style-name="L22">
        <text:list-item>
          <text:p text:style-name="P54"><text:bookmark text:name="WACViewPanel_ClipboardElement Copy 7"/><text:span text:style-name="T22">program</text:span> → <text:span text:style-name="T22">{ statement } EOF</text:span> → <text:span text:style-name="T23">satu </text:span><text:span text:style-name="T22">statement</text:span> <text:span text:style-name="T23">+ </text:span><text:span text:style-name="T22">EOF</text:span> </text:p>
        </text:list-item>
      </text:list>
      <text:section text:style-name="Sect1" text:name="Section8">
        <text:list text:style-name="L23">
          <text:list-item>
            <text:p text:style-name="P55"><text:span text:style-name="T22">statement</text:span> → <text:span text:style-name="T22">compound_stmt</text:span> </text:p>
          </text:list-item>
        </text:list>
        <text:list text:style-name="L24">
          <text:list-item>
            <text:p text:style-name="P56"><text:span text:style-name="T22">compound_stmt</text:span> → <text:span text:style-name="T22">funcdef</text:span> </text:p>
          </text:list-item>
        </text:list>
        <text:list text:style-name="L25">
          <text:list-item>
            <text:p text:style-name="P57"><text:span text:style-name="T22">funcdef</text:span> → <text:span text:style-name="T22">"def" NAME "(" [ param_list ] ")" ":" NEWLINE INDENT { statement } DEDENT</text:span> </text:p>
          </text:list-item>
        </text:list>
        <text:list text:style-name="L26">
          <text:list-item>
            <text:p text:style-name="P58"><text:span text:style-name="T22">NAME</text:span> → <text:span text:style-name="T22">add</text:span> <text:span text:style-name="T24"><text:line-break/></text:span><text:span text:style-name="T23">param_list → </text:span><text:span text:style-name="T22">param { "," param }</text:span> → <text:span text:style-name="T22">param "," param</text:span> → <text:span text:style-name="T22">a , b</text:span> </text:p>
          </text:list-item>
        </text:list>
        <text:list text:style-name="L27">
          <text:list-item>
            <text:p text:style-name="P59"><text:span text:style-name="T23">Sekarang isi blok: </text:span><text:span text:style-name="T22">{ statement }</text:span> → <text:span text:style-name="T23">dua </text:span><text:span text:style-name="T22">statement</text:span> <text:span text:style-name="T23">(assignment dan return)</text:span> </text:p>
          </text:list-item>
        </text:list>
        <text:list text:style-name="L28">
          <text:list-item>
            <text:p text:style-name="P60"><text:span text:style-name="T23">statement1 → </text:span><text:span text:style-name="T22">simple_stmt</text:span> → <text:span text:style-name="T22">assign_stmt NEWLINE</text:span> </text:p>
          </text:list-item>
        </text:list>
        <text:list text:style-name="L29">
          <text:list-item>
            <text:p text:style-name="P61"><text:span text:style-name="T22">assign_stmt</text:span> → <text:span text:style-name="T22">target "=" expr</text:span> </text:p>
          </text:list-item>
        </text:list>
        <text:list text:style-name="L30">
          <text:list-item>
            <text:p text:style-name="P62"><text:span text:style-name="T22">target</text:span> → <text:span text:style-name="T22">c</text:span> </text:p>
          </text:list-item>
        </text:list>
        <text:list text:style-name="L31">
          <text:list-item>
            <text:p text:style-name="P63"><text:span text:style-name="T22">expr</text:span> → <text:span text:style-name="T22">arith</text:span> → <text:span text:style-name="T22">term</text:span> → <text:span text:style-name="T22">factor</text:span> → <text:span text:style-name="T22">power</text:span> → <text:span text:style-name="T22">atom</text:span> → <text:span text:style-name="T22">NAME</text:span> → <text:span text:style-name="T22">a</text:span> </text:p>
          </text:list-item>
        </text:list>
        <text:list text:style-name="L32">
          <text:list-item>
            <text:p text:style-name="P64"><text:span text:style-name="T23">after </text:span><text:span text:style-name="T22">+</text:span> <text:span text:style-name="T23">term → </text:span><text:span text:style-name="T22">b</text:span> → <text:span text:style-name="T23">jadi </text:span><text:span text:style-name="T22">expr</text:span> <text:span text:style-name="T23">= </text:span><text:span text:style-name="T22">a + b</text:span> </text:p>
          </text:list-item>
        </text:list>
        <text:list text:style-name="L33">
          <text:list-item>
            <text:p text:style-name="P65"><text:span text:style-name="T23">statement2 → </text:span><text:span text:style-name="T22">simple_stmt</text:span> → <text:span text:style-name="T22">return_stmt NEWLINE</text:span> </text:p>
          </text:list-item>
        </text:list>
        <text:list text:style-name="L34">
          <text:list-item>
            <text:p text:style-name="P66"><text:soft-page-break/><text:span text:style-name="T22">return_stmt</text:span> → <text:span text:style-name="T22">return</text:span> <text:span text:style-name="T22">expr</text:span> → <text:span text:style-name="T22">expr</text:span> → <text:span text:style-name="T22">NAME</text:span> → <text:span text:style-name="T22">c</text:span> </text:p>
          </text:list-item>
        </text:list>
        <text:list text:style-name="L35">
          <text:list-item>
            <text:p text:style-name="P67"><text:span text:style-name="T23">Tutup </text:span><text:span text:style-name="T22">DEDENT</text:span><text:span text:style-name="T23">, </text:span><text:span text:style-name="T22">EOF</text:span><text:span text:style-name="T23">. → string lengkap sama dengan program.</text:span> </text:p>
          </text:list-item>
        </text:list>
      </text:section>
      <text:p text:style-name="P23"/>
      <text:h text:style-name="P17" text:outline-level="3">Parse Tree</text:h>
      <text:p text:style-name="P68"><text:bookmark text:name="WACViewPanel_ClipboardElement Copy 8"/><text:span text:style-name="T20">program</text:span> </text:p>
      <text:section text:style-name="Sect1" text:name="Section9">
        <text:p text:style-name="P69">└─ <text:span text:style-name="T21">statement (compound_stmt)</text:span><text:span text:style-name="T12"> </text:span></text:p>
        <text:p text:style-name="P69">   └─ <text:span text:style-name="T21">funcdef</text:span><text:span text:style-name="T12"> </text:span></text:p>
        <text:p text:style-name="P69">      ├─ <text:span text:style-name="T21">"def"</text:span><text:span text:style-name="T12"> </text:span></text:p>
        <text:p text:style-name="P69">      ├─ <text:span text:style-name="T21">NAME -&gt; "add"</text:span><text:span text:style-name="T12"> </text:span></text:p>
        <text:p text:style-name="P69">      ├─ <text:span text:style-name="T21">"("</text:span><text:span text:style-name="T12"> </text:span></text:p>
        <text:p text:style-name="P69">      ├─ <text:span text:style-name="T21">param_list</text:span><text:span text:style-name="T12"> </text:span></text:p>
        <text:p text:style-name="P69">      │   ├─ <text:span text:style-name="T21">param -&gt; NAME -&gt; "a"</text:span><text:span text:style-name="T12"> </text:span></text:p>
        <text:p text:style-name="P69">      │   ├─ <text:span text:style-name="T21">","</text:span><text:span text:style-name="T12"> </text:span></text:p>
        <text:p text:style-name="P69">      │   └─ <text:span text:style-name="T21">param -&gt; NAME -&gt; "b"</text:span><text:span text:style-name="T12"> </text:span></text:p>
        <text:p text:style-name="P69">      ├─ <text:span text:style-name="T21">")"</text:span><text:span text:style-name="T12"> </text:span></text:p>
        <text:p text:style-name="P69">      ├─ <text:span text:style-name="T21">":"</text:span><text:span text:style-name="T12"> </text:span></text:p>
        <text:p text:style-name="P69">      ├─ <text:span text:style-name="T21">NEWLINE</text:span><text:span text:style-name="T12"> </text:span></text:p>
        <text:p text:style-name="P69">      ├─ <text:span text:style-name="T21">INDENT</text:span><text:span text:style-name="T12"> </text:span></text:p>
        <text:p text:style-name="P69">      ├─ <text:span text:style-name="T21">statement (simple_stmt)</text:span><text:span text:style-name="T12"> </text:span></text:p>
        <text:p text:style-name="P69">      │   └─ <text:span text:style-name="T21">assign_stmt</text:span><text:span text:style-name="T12"> </text:span></text:p>
        <text:p text:style-name="P69">      │       ├─ <text:span text:style-name="T21">target -&gt; NAME -&gt; "c"</text:span><text:span text:style-name="T12"> </text:span></text:p>
        <text:p text:style-name="P69">      │       ├─ <text:span text:style-name="T21">"="</text:span><text:span text:style-name="T12"> </text:span></text:p>
        <text:p text:style-name="P69">      │       └─ <text:span text:style-name="T21">expr</text:span><text:span text:style-name="T12"> </text:span></text:p>
        <text:p text:style-name="P69">      │           └─ <text:span text:style-name="T21">arith</text:span><text:span text:style-name="T12"> </text:span></text:p>
        <text:p text:style-name="P69">      │               ├─ <text:span text:style-name="T21">term</text:span><text:span text:style-name="T12"> </text:span></text:p>
        <text:p text:style-name="P69">      │               │   └─ <text:span text:style-name="T21">factor -&gt; power -&gt; atom -&gt; NAME -&gt; "a"</text:span><text:span text:style-name="T12"> </text:span></text:p>
        <text:p text:style-name="P69">      │               ├─ <text:span text:style-name="T21">"+"</text:span><text:span text:style-name="T12"> </text:span></text:p>
        <text:p text:style-name="P69">      │               └─ <text:span text:style-name="T21">term</text:span><text:span text:style-name="T12"> </text:span></text:p>
        <text:p text:style-name="P69"><text:soft-page-break/>      │                   └─ <text:span text:style-name="T21">factor -&gt; power -&gt; atom -&gt; NAME -&gt; "b"</text:span><text:span text:style-name="T12"> </text:span></text:p>
        <text:p text:style-name="P69">      │   └─ <text:span text:style-name="T21">NEWLINE</text:span><text:span text:style-name="T12"> </text:span></text:p>
        <text:p text:style-name="P69">      ├─ <text:span text:style-name="T21">statement (simple_stmt)</text:span><text:span text:style-name="T12"> </text:span></text:p>
        <text:p text:style-name="P69">      │   └─ <text:span text:style-name="T21">return_stmt</text:span><text:span text:style-name="T12"> </text:span></text:p>
        <text:p text:style-name="P69">      │       ├─ <text:span text:style-name="T21">"return"</text:span><text:span text:style-name="T12"> </text:span></text:p>
        <text:p text:style-name="P69">      │       └─ <text:span text:style-name="T21">expr -&gt; NAME -&gt; "c"</text:span><text:span text:style-name="T12"> </text:span></text:p>
        <text:p text:style-name="P69">      │   └─ <text:span text:style-name="T21">NEWLINE</text:span><text:span text:style-name="T12"> </text:span></text:p>
        <text:p text:style-name="P69">      └─ <text:span text:style-name="T21">DEDENT</text:span><text:span text:style-name="T12"> </text:span></text:p>
      </text:section>
      <text:p text:style-name="P23"/>
      <text:h text:style-name="P17" text:outline-level="3">AST</text:h>
      <text:p text:style-name="P68"><text:bookmark text:name="WACViewPanel_ClipboardElement Copy 9"/><text:span text:style-name="T20">Module</text:span> </text:p>
      <text:section text:style-name="Sect1" text:name="Section10">
        <text:p text:style-name="P69">└─ <text:span text:style-name="T21">FunctionDef (name="add", params=["a", "b"])</text:span><text:span text:style-name="T12"> </text:span></text:p>
        <text:p text:style-name="P69">   ├─ <text:span text:style-name="T21">Assign</text:span><text:span text:style-name="T12"> </text:span></text:p>
        <text:p text:style-name="P69">   │   ├─ <text:span text:style-name="T21">Target: Name("c")</text:span><text:span text:style-name="T12"> </text:span></text:p>
        <text:p text:style-name="P69">   │   └─ <text:span text:style-name="T21">Value: BinOp(+)</text:span><text:span text:style-name="T12"> </text:span></text:p>
        <text:p text:style-name="P69">   │       ├─ <text:span text:style-name="T21">Left: Name("a")</text:span><text:span text:style-name="T12"> </text:span></text:p>
        <text:p text:style-name="P69">   │       └─ <text:span text:style-name="T21">Right: Name("b")</text:span><text:span text:style-name="T12"> </text:span></text:p>
        <text:p text:style-name="P69">   └─ <text:span text:style-name="T21">Return</text:span><text:span text:style-name="T12"> </text:span></text:p>
        <text:p text:style-name="P69">       └─ <text:span text:style-name="T21">Value: Name("c")</text:span><text:span text:style-name="T12"> </text:span></text:p>
      </text:section>
      <text:p text:style-name="P23"/>
      <text:h text:style-name="P17" text:outline-level="3">Dokumentasi Proses Pembentukan Grammar dan Alasan Desain</text:h>
      <text:list text:style-name="L36">
        <text:list-item>
          <text:p text:style-name="P70"><text:bookmark text:name="WACViewPanel_ClipboardElement Copy 10"/><text:span text:style-name="T23">Sumber: PEG grammar CPython dari referensi digunakan sebagai referensi utama (mis. </text:span><text:span text:style-name="T22">function_def</text:span><text:span text:style-name="T23">, </text:span><text:span text:style-name="T22">params</text:span><text:span text:style-name="T23">, </text:span><text:span text:style-name="T22">suite</text:span><text:span text:style-name="T23">, </text:span><text:span text:style-name="T22">assign_stmt</text:span><text:span text:style-name="T23">, </text:span><text:span text:style-name="T22">return_stmt</text:span><text:span text:style-name="T23">, serta aturan ekspresi dan prioritas operator).</text:span> </text:p>
        </text:list-item>
      </text:list>
      <text:section text:style-name="Sect1" text:name="Section11">
        <text:list text:continue-numbering="true" text:style-name="L36">
          <text:list-item>
            <text:p text:style-name="P71"><text:span text:style-name="T23">Mengapa disederhanakan?</text:span> </text:p>
            <text:list>
              <text:list-item>
                <text:p text:style-name="P71"><text:span text:style-name="T23">Supaya bisa dijabarkan manual (derivation &amp; parse tree). grammar CPython penuh terlalu besar.</text:span> </text:p>
              </text:list-item>
              <text:list-item>
                <text:p text:style-name="P71"><text:span text:style-name="T23">Fokus: </text:span><text:span text:style-name="T22">def</text:span><text:span text:style-name="T23">-function, parameter list, assignment, return, ekspresi aritmetika. Fitur lain (comprehensions, decorators, imports, try/with, pattern matching) dihilangkan untuk menghindari kompleksitas yang tidak diperlukan.</text:span> </text:p>
              </text:list-item>
            </text:list>
          </text:list-item>
          <text:list-item>
            <text:p text:style-name="P71"><text:soft-page-break/><text:span text:style-name="T23">Konversi PEG → EBNF:</text:span> </text:p>
            <text:list>
              <text:list-item>
                <text:p text:style-name="P71"><text:span text:style-name="T23">Alternatif PEG yang menggunakan </text:span><text:span text:style-name="T22">|</text:span> <text:span text:style-name="T23">(ordered choice) saya ubah ke alternatif EBNF (masih terpadu).</text:span> </text:p>
              </text:list-item>
              <text:list-item>
                <text:p text:style-name="P71"><text:span text:style-name="T23">Lookaheads (&amp; / !) di PEG (digunakan di grammar CPython untuk disambiguasi) </text:span><text:span text:style-name="T25">tidak</text:span> <text:span text:style-name="T23">saya masukkan karena subset ini sederhana; seandainya diperlukan (mis. untuk membedakan </text:span><text:span text:style-name="T22">NAME "("</text:span> <text:span text:style-name="T23">vs </text:span><text:span text:style-name="T22">NAME</text:span> <text:span text:style-name="T23">dalam target), parser implementasi harus menambahkan lookahead di lexer/parser.</text:span> </text:p>
              </text:list-item>
            </text:list>
          </text:list-item>
          <text:list-item>
            <text:p text:style-name="P71"><text:span text:style-name="T23">Indentation:</text:span> </text:p>
            <text:list>
              <text:list-item>
                <text:p text:style-name="P71"><text:span text:style-name="T23">CPython PEG menghasilkan token </text:span><text:span text:style-name="T22">INDENT</text:span><text:span text:style-name="T23">/</text:span><text:span text:style-name="T22">DEDENT</text:span><text:span text:style-name="T23">/</text:span><text:span text:style-name="T22">NEWLINE</text:span><text:span text:style-name="T23">. Grammar EBNF ini juga mengandalkan token-token tersebut; lexer harus tetap memproduksinya. Tanpa token indent/dedent, blok tidak bisa dikenali.</text:span> </text:p>
              </text:list-item>
            </text:list>
          </text:list-item>
          <text:list-item>
            <text:p text:style-name="P71"><text:span text:style-name="T23">Precedence operator: disusun sedemikian agar urutan evaluasi sesuai Python (power → factor → term → arith → compare → and/or). Ini mengikuti struktur di PEG aslinya (mis. </text:span><text:span text:style-name="T22">sum</text:span><text:span text:style-name="T23">, </text:span><text:span text:style-name="T22">term</text:span><text:span text:style-name="T23">, </text:span><text:span text:style-name="T22">factor</text:span><text:span text:style-name="T23">, </text:span><text:span text:style-name="T22">power</text:span> <text:span text:style-name="T23">di PEG).</text:span> </text:p>
          </text:list-item>
          <text:list-item>
            <text:p text:style-name="P71"><text:span text:style-name="T23">Tokenisasi tanggung jawab lexer: rules ini mengasumsikan lexer memisahkan </text:span><text:span text:style-name="T22">NAME</text:span><text:span text:style-name="T23">, </text:span><text:span text:style-name="T22">NUMBER</text:span><text:span text:style-name="T23">, </text:span><text:span text:style-name="T22">STRING</text:span><text:span text:style-name="T23">, serta menyediakan NEWLINE/INDENT/DEDENT. Grammar tidak menangani whitespace/komentar.</text:span> </text:p>
          </text:list-item>
          <text:list-item>
            <text:p text:style-name="P71"><text:span text:style-name="T23">Ambiguitas &amp; Praktik: grammar EBNF ini deterministic untuk contoh yang diberikan. Pada implementasi nyata (parser generator) mungkin perlu memakai PEG (no backtracking or explicit lookahead) atau LL/LR parser dengan penanganan left-recursion (atau transformasi) sesuai alat.</text:span> </text:p>
          </text:list-item>
        </text:list>
      </text:section>
      <text:p text:style-name="P23"/>
      <text:h text:style-name="P16" text:outline-level="2">Referensi</text:h>
      <text:p text:style-name="P72"><text:a xlink:type="simple" xlink:href="https://docs.python.org/3/reference/grammar.html" office:target-frame-name="_blank" xlink:show="new" text:style-name="Internet_20_link" text:visited-style-name="Visited_20_Internet_20_Link"><text:bookmark text:name="WACViewPanel_ClipboardElement Copy 11"/><text:span text:style-name="T26">https://docs.python.org/3/reference/grammar.html</text:span></text:a><text:span text:style-name="T16"> </text:span></text:p>
      <text:p text:style-name="P73">ISO C11 Standard (ISO/IEC 9899:2011) dan GCC parser implementation</text:p>
      <text:p text:style-name="P73"><text:a xlink:type="simple" xlink:href="https://cs.wmich.edu/~gupta/teaching/cs4850/sumII06/The%20syntax%20of%20C%20in%20Backus-Naur%20form.htm" text:style-name="Internet_20_link" text:visited-style-name="Visited_20_Internet_20_Link">https://cs.wmich.edu/~gupta/teaching/cs4850/sumII06/The%20syntax%20of%20C%20in%20Backus-Naur%20form.htm</text:a></text:p>
      <text:p text:style-name="P7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nsolas" svg:font-family="Consolas, Consolas_MSFontServi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'Times New Roman_EmbeddedFont', 'Times New Roman_MSFontService', serif"/>
    <style:font-face style:name="Times New Roman1" svg:font-family="'Times New Roman', 'Times New Roman_MSFontService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2T09:44:04.115841375</meta:creation-date>
    <dc:date>2025-09-09T07:03:29.962299524</dc:date>
    <meta:editing-duration>PT13H19M38S</meta:editing-duration>
    <meta:editing-cycles>5</meta:editing-cycles>
    <meta:generator>LibreOffice/25.8.1.1$Linux_X86_64 LibreOffice_project/580$Build-1</meta:generator>
    <meta:print-date>2025-09-08T21:55:33.071342539</meta:print-date>
    <meta:printed-by>PDF files</meta:printed-by>
    <meta:document-statistic meta:table-count="1" meta:image-count="0" meta:object-count="0" meta:page-count="12" meta:paragraph-count="269" meta:word-count="1964" meta:character-count="14293" meta:non-whitespace-character-count="10802"/>
  </office:meta>
</office:document-meta>
</file>