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020f60" officeooo:paragraph-rsid="00020f60"/>
    </style:style>
    <style:style style:name="P2" style:family="paragraph" style:parent-style-name="Text_20_body">
      <style:text-properties officeooo:rsid="00020f60" officeooo:paragraph-rsid="00020f60"/>
    </style:style>
    <style:style style:name="P3" style:family="paragraph" style:parent-style-name="Standard">
      <style:text-properties officeooo:rsid="00020f60" officeooo:paragraph-rsid="00020f60"/>
    </style:style>
    <style:style style:name="P4" style:family="paragraph" style:parent-style-name="Standard">
      <style:paragraph-properties fo:text-align="justify" style:justify-single-word="false"/>
      <style:text-properties officeooo:rsid="00020f60" officeooo:paragraph-rsid="00020f60"/>
    </style:style>
    <style:style style:name="P5" style:family="paragraph" style:parent-style-name="Standard">
      <style:text-properties officeooo:rsid="000406b4" officeooo:paragraph-rsid="000406b4"/>
    </style:style>
    <style:style style:name="P6" style:family="paragraph" style:parent-style-name="Standard" style:list-style-name="L1">
      <style:text-properties officeooo:rsid="000406b4" officeooo:paragraph-rsid="000406b4"/>
    </style:style>
    <style:style style:name="P7" style:family="paragraph" style:parent-style-name="Standard" style:list-style-name="L2">
      <style:text-properties officeooo:rsid="000406b4" officeooo:paragraph-rsid="000406b4"/>
    </style:style>
    <style:style style:name="P8" style:family="paragraph" style:parent-style-name="Standard" style:list-style-name="L2">
      <style:text-properties officeooo:rsid="000406b4" officeooo:paragraph-rsid="000414bd"/>
    </style:style>
    <style:style style:name="P9" style:family="paragraph" style:parent-style-name="Standard" style:list-style-name="L2">
      <style:text-properties officeooo:rsid="000414bd" officeooo:paragraph-rsid="000414bd"/>
    </style:style>
    <style:style style:name="T1" style:family="text">
      <style:text-properties officeooo:rsid="000406b4"/>
    </style:style>
    <style:style style:name="T2" style:family="text">
      <style:text-properties officeooo:rsid="000414b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ming Language Pragmatics</text:p>
      <text:p text:style-name="P2">Quiz 1</text:p>
      <text:p text:style-name="P3">Nama: Arkan Ramadhan Nugraha</text:p>
      <text:p text:style-name="P3">NIM: 241524033</text:p>
      <text:p text:style-name="P3">Kelas: 2B-TI4</text:p>
      <text:p text:style-name="P3"/>
      <text:p text:style-name="P4">Bahasa pemrgoraman yang terbaik untuk memenuhi kasus tersebut adalah C++. Saya memilih C++ karena C++ menawarkan kontrol penuh terhadap sistem dan sumber daya, memungkinkan pengembang untuk mengoptimalkan performa. <text:span text:style-name="T1">Ini sangat penting untuk sistem real-time seperti penjadwalan kereta dan pengaturan sinyal. C++ juga mendukung OOP, memudahkan pengorganisasian kode dalam sistem besar serta meningkatkan maintainability. C++ juga memiliki kemampuan multithreading dan concurrency yang mumpuni, memungkinkan sistem untuk menangani banyak proses secara paralel, contohnya pengelolaan banyak jalur kereta secara bersamaan tanpa konflik. C++ bersifat determinitik dan tidak bergantung pada ga</text:span><text:span text:style-name="T2">r</text:span><text:span text:style-name="T1">bage collector, sehingga bahasa ini juga unggul dalam hal latensi rendah dan kestabilan waktu eksekusi yang sangat penting agar sistem tidak mengalami delay.</text:span></text:p>
      <text:p text:style-name="P3"/>
      <text:p text:style-name="P5">Kelebihan</text:p>
      <text:list text:style-name="L1">
        <text:list-item>
          <text:p text:style-name="P6">Performa tinggi.</text:p>
        </text:list-item>
        <text:list-item>
          <text:p text:style-name="P6">Kontrol penuh atas <text:span text:style-name="T2">memori dan hardware</text:span>.</text:p>
        </text:list-item>
        <text:list-item>
          <text:p text:style-name="P6"><text:span text:style-name="T2">Mendukun c</text:span>oncurrency dan <text:span text:style-name="T2">m</text:span>ultithreading.</text:p>
        </text:list-item>
        <text:list-item>
          <text:p text:style-name="P6">Struktur <text:span text:style-name="T2">modular melalui OOP, cocok untuk sistem besar.</text:span></text:p>
        </text:list-item>
        <text:list-item>
          <text:p text:style-name="P6">Ekosistem <text:span text:style-name="T2">l</text:span>uas, <text:span text:style-name="T2">banyak dipakai industri</text:span>.</text:p>
        </text:list-item>
        <text:list-item>
          <text:p text:style-name="P6">Deterministik. Tidak ada garbage collector sehingga waktu eksekusi lebih stabil.</text:p>
        </text:list-item>
      </text:list>
      <text:p text:style-name="P5">Kekurangan</text:p>
      <text:list text:style-name="L2">
        <text:list-item>
          <text:p text:style-name="P7">Rentan terhadap kesalahan memori, sehingga pengembang harus menulis kode dengan disiplin tinggi sebagai konsekuensi dari fleksibilitas C++.</text:p>
        </text:list-item>
        <text:list-item>
          <text:p text:style-name="P8">Sintaks C++ tergolong kompleks karena mendukung banyak fitur tingkat lanjut, seperti pointer, template, dan multiple inheritance. Hal ini bisa membuat kode sulit dibaca dan lebih mudah menimbulkan kesalahan jika tidak ditulis dengan hati-hati.</text:p>
        </text:list-item>
        <text:list-item>
          <text:p text:style-name="P8"><text:span text:style-name="T2">T</text:span>idak <text:span text:style-name="T2">memiliki</text:span> garbage collector, <text:span text:style-name="T2">sehingga manajemen memori harus dilakukan manual.</text:span></text:p>
        </text:list-item>
        <text:list-item>
          <text:p text:style-name="P7"><text:span text:style-name="T2">W</text:span>aktu kompilas<text:span text:style-name="T2">i bisa lambat, terutama untuk proyek besar.</text:span></text:p>
        </text:list-item>
        <text:list-item>
          <text:p text:style-name="P9">Proses pengembangan (ngoding) lebih memakan waktu dibanding bahasa tingkat tinggi lainny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19T09:06:15.469262020</meta:creation-date>
    <dc:date>2025-08-19T09:44:20.850574278</dc:date>
    <meta:editing-duration>PT3M46S</meta:editing-duration>
    <meta:editing-cycles>1</meta:editing-cycles>
    <meta:document-statistic meta:table-count="0" meta:image-count="0" meta:object-count="0" meta:page-count="1" meta:paragraph-count="19" meta:word-count="249" meta:character-count="1847" meta:non-whitespace-character-count="1628"/>
    <meta:generator>LibreOffice/25.2.5.2$Linux_X86_64 LibreOffice_project/520$Build-2</meta:generator>
  </office:meta>
</office:document-meta>
</file>