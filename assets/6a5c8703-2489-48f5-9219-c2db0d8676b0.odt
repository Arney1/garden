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6524" officeooo:paragraph-rsid="00116524"/>
    </style:style>
    <style:style style:name="P2" style:family="paragraph" style:parent-style-name="Heading_20_1">
      <style:text-properties officeooo:rsid="00116524" officeooo:paragraph-rsid="00116524"/>
    </style:style>
    <style:style style:name="P3" style:family="paragraph" style:parent-style-name="Text_20_body" style:list-style-name="L1">
      <style:paragraph-properties fo:text-align="justify" style:justify-single-word="false"/>
      <style:text-properties officeooo:rsid="00116524" officeooo:paragraph-rsid="00116524"/>
    </style:style>
    <style:style style:name="P4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align="justify" style:justify-single-word="false" fo:text-indent="0in" style:auto-text-indent="false" style:page-number="auto" fo:background-color="transparent"/>
      <style:text-properties officeooo:rsid="00116524" officeooo:paragraph-rsid="00116524"/>
    </style:style>
    <style:style style:name="P5" style:family="paragraph" style:parent-style-name="Text_20_body" style:list-style-name="L2">
      <style:paragraph-properties fo:text-align="justify" style:justify-single-word="false"/>
      <style:text-properties officeooo:rsid="00130666" officeooo:paragraph-rsid="00130666"/>
    </style:style>
    <style:style style:name="P6" style:family="paragraph" style:parent-style-name="Text_20_body" style:list-style-name="L2">
      <style:paragraph-properties fo:text-align="justify" style:justify-single-word="false"/>
      <style:text-properties fo:font-weight="normal" officeooo:rsid="00130666" officeooo:paragraph-rsid="00130666" style:font-weight-asian="normal" style:font-weight-complex="normal"/>
    </style:style>
    <style:style style:name="P7" style:family="paragraph" style:parent-style-name="Heading_20_1">
      <style:text-properties officeooo:rsid="00130666" officeooo:paragraph-rsid="00130666"/>
    </style:style>
    <style:style style:name="P8" style:family="paragraph" style:parent-style-name="Text_20_body" style:list-style-name="L3">
      <style:paragraph-properties fo:text-align="justify" style:justify-single-word="false"/>
      <style:text-properties officeooo:rsid="00130666" officeooo:paragraph-rsid="00130666"/>
    </style:style>
    <style:style style:name="P9" style:family="paragraph" style:parent-style-name="Text_20_body" style:list-style-name="L3">
      <style:paragraph-properties fo:text-align="justify" style:justify-single-word="false"/>
      <style:text-properties fo:font-weight="normal" officeooo:rsid="00130666" officeooo:paragraph-rsid="00130666" style:font-weight-asian="normal" style:font-weight-complex="normal"/>
    </style:style>
    <style:style style:name="P10" style:family="paragraph" style:parent-style-name="Heading_20_1">
      <style:text-properties officeooo:rsid="00131b21" officeooo:paragraph-rsid="00131b21"/>
    </style:style>
    <style:style style:name="P11" style:family="paragraph" style:parent-style-name="Text_20_body" style:list-style-name="L4">
      <style:paragraph-properties fo:text-align="justify" style:justify-single-word="false"/>
      <style:text-properties officeooo:rsid="00131b21" officeooo:paragraph-rsid="00131b21"/>
    </style:style>
    <style:style style:name="P12" style:family="paragraph" style:parent-style-name="Heading_20_1">
      <style:paragraph-properties fo:text-align="justify" style:justify-single-word="false"/>
      <style:text-properties officeooo:rsid="00131b21" officeooo:paragraph-rsid="00131b21"/>
    </style:style>
    <style:style style:name="P13" style:family="paragraph" style:parent-style-name="Text_20_body">
      <style:paragraph-properties fo:text-align="justify" style:justify-single-word="false"/>
      <style:text-properties officeooo:paragraph-rsid="00131b21"/>
    </style:style>
    <style:style style:name="P14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15" style:family="paragraph" style:parent-style-name="Text_20_body" style:list-style-name="L5">
      <style:paragraph-properties fo:text-align="justify" style:justify-single-word="false"/>
    </style:style>
    <style:style style:name="P16" style:family="paragraph" style:parent-style-name="Text_20_body">
      <style:paragraph-properties fo:text-align="justify" style:justify-single-word="false"/>
      <style:text-properties fo:font-weight="normal" officeooo:rsid="001422bd" officeooo:paragraph-rsid="001422bd" style:font-weight-asian="normal" style:font-weight-complex="normal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P19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font-weight="normal" officeooo:rsid="00131b21" officeooo:paragraph-rsid="00131b21" style:font-weight-asian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font-weight="normal" officeooo:paragraph-rsid="00131b2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/>
    </style:style>
    <style:style style:name="T3" style:family="text">
      <style:text-properties fo:font-style="italic"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M: 241524033</text:p>
      <text:p text:style-name="P1">Nama: Arkan Ramadhan Nugraha</text:p>
      <text:p text:style-name="P1">Kelas: 2B-TI4</text:p>
      <text:p text:style-name="P1">Mata Kuliah: Programming Language Pragmatics</text:p>
      <text:p text:style-name="P1"/>
      <text:h text:style-name="P2" text:outline-level="1">Analisis Program 1</text:h>
      <text:list text:style-name="L1">
        <text:list-item>
          <text:p text:style-name="P3">Sintaksis</text:p>
          <text:list>
            <text:list-item>
              <text:p text:style-name="P3">Kode ini secara sintaksis benar. Deklarasi union Data, fungsi main, inisialisasi variabel, dan pemanggilan printf semuanya seusai dengan aturan bahasa C.</text:p>
            </text:list-item>
          </text:list>
        </text:list-item>
        <text:list-item>
          <text:p text:style-name="P3">Sematik: Program ini mendemonstrasikan sifat dasar union</text:p>
          <text:list>
            <text:list-item>
              <text:p text:style-name="P3">data.i = 10; menyimpan nilai integer 10 di dalam memori union.</text:p>
            </text:list-item>
            <text:list-item>
              <text:p text:style-name="P3">data.f = 3.14; menimpa (overwrite) memori yang sebelumnya berisi nilai 10 dengan representasi biner dari float 3.14</text:p>
            </text:list-item>
            <text:list-item>
              <text:p text:style-name="P3">data.c = ‘A’; menimpa lagi memori yang sama dengan kode ASCII untuk karakter ‘A’</text:p>
            </text:list-item>
          </text:list>
        </text:list-item>
      </text:list>
      <text:p text:style-name="P4">Makna dari program ini adalah untuk menunjukkan bahwa union hanya dapat menyimpan satu nilai pada satu waktu dalam satu lokasi memori yang sama</text:p>
      <text:h text:style-name="P2" text:outline-level="1">Analisis Program 2</text:h>
      <text:list text:style-name="L2">
        <text:list-item>
          <text:p text:style-name="P5">Sintaksis</text:p>
          <text:list>
            <text:list-item>
              <text:p text:style-name="P5"><text:span text:style-name="T1">Kode versi perbaikan ini sekarang secara sintaksis benar. Semua statement eksekusi (assignment dan pemanggilan </text:span><text:span text:style-name="Source_20_Text"><text:span text:style-name="T1">printf</text:span></text:span><text:span text:style-name="T1">) sudah ditempatkan dengan benar di dalam fungsi </text:span><text:span text:style-name="Source_20_Text"><text:span text:style-name="T1">main</text:span></text:span><text:span text:style-name="T1">.</text:span></text:p>
            </text:list-item>
          </text:list>
        </text:list-item>
        <text:list-item>
          <text:p text:style-name="P5">Semantik</text:p>
          <text:list>
            <text:list-item>
              <text:p text:style-name="P6">Tujuan program ini adalah untuk mengelola sekumpulan status ya/tidak (dalam kasus ini, hobi) secara efisien dalam hal penggunaan memori.</text:p>
            </text:list-item>
            <text:list-item>
              <text:p text:style-name="P5"><text:span text:style-name="Source_20_Text"><text:span text:style-name="T1">struct Hobi</text:span></text:span><text:span text:style-name="T1"> menggunakan bit-fields. Setiap anggota (misalnya </text:span><text:span text:style-name="Source_20_Text"><text:span text:style-name="T1">music : 1</text:span></text:span><text:span text:style-name="T1">) hanya dialokasikan 1 bit memori, bukan tipe data standar seperti </text:span><text:span text:style-name="Source_20_Text"><text:span text:style-name="T1">int</text:span></text:span><text:span text:style-name="T1"> atau </text:span><text:span text:style-name="Source_20_Text"><text:span text:style-name="T1">char</text:span></text:span><text:span text:style-name="T1">.</text:span></text:p>
            </text:list-item>
            <text:list-item>
              <text:p text:style-name="P6">Ini adalah cara untuk "mengemas" banyak data boolean ke dalam ruang memori yang sangat kecil.</text:p>
            </text:list-item>
            <text:list-item>
              <text:p text:style-name="P5"><text:span text:style-name="T1">Program ini menetapkan hobi </text:span><text:span text:style-name="Source_20_Text"><text:span text:style-name="T1">music</text:span></text:span><text:span text:style-name="T1">, </text:span><text:span text:style-name="Source_20_Text"><text:span text:style-name="T1">gaming</text:span></text:span><text:span text:style-name="T1">, dan </text:span><text:span text:style-name="Source_20_Text"><text:span text:style-name="T1">coding</text:span></text:span><text:span text:style-name="T1"> ke </text:span><text:span text:style-name="Source_20_Text"><text:span text:style-name="T1">1</text:span></text:span><text:span text:style-name="T1"> (aktif) dan kemudian mencetak status dari beberapa hobi. </text:span><text:span text:style-name="Source_20_Text"><text:span text:style-name="T1">travel</text:span></text:span><text:span text:style-name="T1"> akan tetap </text:span><text:span text:style-name="Source_20_Text"><text:span text:style-name="T1">0</text:span></text:span><text:span text:style-name="T1"> karena tidak pernah diubah.</text:span></text:p>
            </text:list-item>
          </text:list>
        </text:list-item>
      </text:list>
      <text:h text:style-name="P7" text:outline-level="1">Analisis Program 3</text:h>
      <text:list text:style-name="L3">
        <text:list-item>
          <text:p text:style-name="P8">Sintaksis</text:p>
          <text:list>
            <text:list-item>
              <text:p text:style-name="P8"><text:soft-page-break/><text:span text:style-name="T1">Kode ini secara sintaksis benar. Penggunaan preprocessor </text:span><text:span text:style-name="Source_20_Text"><text:span text:style-name="T1">#define</text:span></text:span><text:span text:style-name="T1"> untuk konstanta dan operator bitwise (</text:span><text:span text:style-name="Source_20_Text"><text:span text:style-name="T1">|</text:span></text:span><text:span text:style-name="T1">, </text:span><text:span text:style-name="Source_20_Text"><text:span text:style-name="T1">&amp;</text:span></text:span><text:span text:style-name="T1">) sudah tepat.</text:span></text:p>
            </text:list-item>
          </text:list>
        </text:list-item>
        <text:list-item>
          <text:p text:style-name="P8">Sematiks</text:p>
          <text:list>
            <text:list-item>
              <text:p text:style-name="P9">Program ini mencapai tujuan yang sama dengan Program 2 (mengelola flag hobi) tetapi menggunakan teknik yang berbeda, yaitu bitmasking.</text:p>
            </text:list-item>
            <text:list-item>
              <text:p text:style-name="P8"><text:span text:style-name="T1">Sebuah variabel </text:span><text:span text:style-name="Source_20_Text"><text:span text:style-name="T1">unsigned int hobi</text:span></text:span><text:span text:style-name="T1"> digunakan sebagai "kanvas" bit.</text:span></text:p>
            </text:list-item>
            <text:list-item>
              <text:p text:style-name="P8"><text:span text:style-name="T1">Setiap hobi direpresentasikan oleh satu bit spesifik pada kanvas tersebut (misalnya, </text:span><text:span text:style-name="Source_20_Text"><text:span text:style-name="T1">MUSIC</text:span></text:span><text:span text:style-name="T1"> adalah bit ke-0, </text:span><text:span text:style-name="Source_20_Text"><text:span text:style-name="T1">SPORT</text:span></text:span><text:span text:style-name="T1"> bit ke-1, dst.).</text:span></text:p>
            </text:list-item>
            <text:list-item>
              <text:p text:style-name="P8"><text:span text:style-name="T1">Operator </text:span><text:span text:style-name="Source_20_Text"><text:span text:style-name="T1">|=</text:span></text:span><text:span text:style-name="T1"> (Bitwise OR Assignment) digunakan untuk "menyalakan" bit yang sesuai dengan hobi mahasiswa tanpa mengganggu bit lain.</text:span></text:p>
            </text:list-item>
            <text:list-item>
              <text:p text:style-name="P8"><text:span text:style-name="T1">Operator </text:span><text:span text:style-name="Source_20_Text"><text:span text:style-name="T1">&amp;</text:span></text:span><text:span text:style-name="T1"> (Bitwise AND) digunakan dalam </text:span><text:span text:style-name="Source_20_Text"><text:span text:style-name="T1">if</text:span></text:span><text:span text:style-name="T1"> untuk memeriksa apakah bit tertentu sudah "menyala".</text:span></text:p>
            </text:list-item>
          </text:list>
        </text:list-item>
      </text:list>
      <text:h text:style-name="P10" text:outline-level="1">Analisis Program 4</text:h>
      <text:list text:style-name="L4">
        <text:list-item>
          <text:p text:style-name="P11">Sintaksis</text:p>
          <text:list>
            <text:list-item>
              <text:p text:style-name="P11"><text:span text:style-name="T1">Kode ini secara sintaksis benar. Definisi </text:span><text:span text:style-name="Source_20_Text"><text:span text:style-name="T1">enum</text:span></text:span><text:span text:style-name="T1">, </text:span><text:span text:style-name="Source_20_Text"><text:span text:style-name="T1">union</text:span></text:span><text:span text:style-name="T1">, dan </text:span><text:span text:style-name="Source_20_Text"><text:span text:style-name="T1">struct</text:span></text:span><text:span text:style-name="T1"> yang menggabungkan keduanya adalah pola yang valid dan umum.</text:span></text:p>
            </text:list-item>
          </text:list>
        </text:list-item>
        <text:list-item>
          <text:p text:style-name="P11">Semantiks</text:p>
          <text:list>
            <text:list-item>
              <text:p text:style-name="P11">Program ini mendemonstrasikan cara aman menggunakan <text:span text:style-name="Source_20_Text">union</text:span>, yang dikenal sebagai pola <text:span text:style-name="T2">Tagged Union</text:span> atau <text:span text:style-name="T2">Discriminated Union</text:span>.</text:p>
            </text:list-item>
            <text:list-item>
              <text:p text:style-name="P11"><text:span text:style-name="Source_20_Text">struct Variant</text:span> menyelesaikan masalah <text:span text:style-name="Source_20_Text">union</text:span> (tidak tahu tipe data apa yang aktif) dengan menyertakan "tag" (<text:span text:style-name="Source_20_Text">enum DataType type</text:span>).</text:p>
            </text:list-item>
            <text:list-item>
              <text:p text:style-name="P11">Sebelum mengisi nilai ke <text:span text:style-name="Source_20_Text">union</text:span> (<text:span text:style-name="Source_20_Text">v.value.f = 3.14;</text:span>), program ini terlebih dahulu menetapkan tag-nya (<text:span text:style-name="Source_20_Text">v.type = FLOAT;</text:span>).</text:p>
            </text:list-item>
            <text:list-item>
              <text:p text:style-name="P11">Saat akan membaca nilainya, program memeriksa tag terlebih dahulu (<text:span text:style-name="Source_20_Text">if (v.type == FLOAT)</text:span>) untuk memastikan bahwa ia menafsirkan data biner di dalam <text:span text:style-name="Source_20_Text">union</text:span> dengan cara yang benar. Ini mencegah pembacaan data yang salah.</text:p>
            </text:list-item>
          </text:list>
        </text:list-item>
      </text:list>
      <text:h text:style-name="P12" text:outline-level="1">Efek Memori Overlap pada Union</text:h>
      <text:p text:style-name="P13"><text:span text:style-name="T1">Konsep utama dari </text:span><text:span text:style-name="Source_20_Text"><text:span text:style-name="T1">union</text:span></text:span><text:span text:style-name="T1"> adalah semua anggotanya berbagi lokasi memori yang sama. Ini disebut sebagai </text:span><text:span text:style-name="T3">memory overlap</text:span><text:span text:style-name="T1">. Ukuran memori yang dialokasikan untuk sebuah </text:span><text:span text:style-name="Source_20_Text"><text:span text:style-name="T1">union</text:span></text:span><text:span text:style-name="T1"> adalah ukuran anggota terbesarnya.</text:span></text:p>
      <text:p text:style-name="P14">Efeknya adalah:</text:p>
      <text:list text:style-name="L5">
        <text:list-item>
          <text:p text:style-name="P15"><text:soft-page-break/><text:span text:style-name="T1">Hanya Satu Nilai Aktif: Anda hanya bisa menyimpan nilai dari satu anggota pada satu waktu. Ketika Anda memberikan nilai ke satu anggota (misalnya </text:span><text:span text:style-name="Source_20_Text"><text:span text:style-name="T1">data.f</text:span></text:span><text:span text:style-name="T1">), Anda secara efektif menimpa (overwrite) data dari anggota lain (</text:span><text:span text:style-name="Source_20_Text"><text:span text:style-name="T1">data.i</text:span></text:span><text:span text:style-name="T1"> atau </text:span><text:span text:style-name="Source_20_Text"><text:span text:style-name="T1">data.c</text:span></text:span><text:span text:style-name="T1">) yang mungkin ada di sana sebelumnya.</text:span></text:p>
        </text:list-item>
        <text:list-item>
          <text:p text:style-name="P15"><text:span text:style-name="T1">Interpretasi Ulang Bit: Jika Anda menulis ke satu anggota dan mencoba membaca dari anggota lain (misalnya, menulis </text:span><text:span text:style-name="Source_20_Text"><text:span text:style-name="T1">float</text:span></text:span><text:span text:style-name="T1"> lalu membaca </text:span><text:span text:style-name="Source_20_Text"><text:span text:style-name="T1">int</text:span></text:span><text:span text:style-name="T1">), kompiler akan mencoba menginterpretasikan pola bit dari </text:span><text:span text:style-name="Source_20_Text"><text:span text:style-name="T1">float</text:span></text:span><text:span text:style-name="T1"> </text:span><text:span text:style-name="T3">seolah-olah</text:span><text:span text:style-name="T1"> itu adalah </text:span><text:span text:style-name="Source_20_Text"><text:span text:style-name="T1">int</text:span></text:span><text:span text:style-name="T1">. Hasilnya hampir selalu berupa nilai "sampah" (</text:span><text:span text:style-name="T3">garbage value</text:span><text:span text:style-name="T1">) dan merupakan </text:span><text:span text:style-name="T3">undefined behavior</text:span><text:span text:style-name="T1"> dalam standar C.</text:span></text:p>
        </text:list-item>
      </text:list>
      <text:h text:style-name="P10" text:outline-level="1">Perbandingan Ukuran struct vs union dengan sizeof()</text:h>
      <text:p text:style-name="P13"><text:span text:style-name="T1">Perbedaan mendasar antara </text:span><text:span text:style-name="Source_20_Text"><text:span text:style-name="T1">struct</text:span></text:span><text:span text:style-name="T1"> dan </text:span><text:span text:style-name="Source_20_Text"><text:span text:style-name="T1">union</text:span></text:span><text:span text:style-name="T1"> tercermin dari cara </text:span><text:span text:style-name="Source_20_Text"><text:span text:style-name="T1">sizeof()</text:span></text:span><text:span text:style-name="T1"> menghitung ukurannya.</text:span></text:p>
      <text:p text:style-name="P16">struct</text:p>
      <text:p text:style-name="P17"><text:span text:style-name="T1">Ukuran sebuah </text:span><text:span text:style-name="Source_20_Text"><text:span text:style-name="T1">struct</text:span></text:span><text:span text:style-name="T1"> adalah jumlah ukuran semua anggotanya, ditambah dengan kemungkinan adanya </text:span><text:span text:style-name="T3">padding</text:span><text:span text:style-name="T1">. Padding adalah byte tambahan yang disisipkan oleh kompiler untuk memastikan setiap anggota berada pada alamat memori yang sesuai (alignment) demi akses yang lebih cepat. </text:span></text:p>
      <text:p text:style-name="P18">sizeof(struct)≥∑sizeof(anggota)</text:p>
      <text:p text:style-name="P19">union</text:p>
      <text:p text:style-name="P17"><text:span text:style-name="T1">Ukuran sebuah </text:span><text:span text:style-name="Source_20_Text"><text:span text:style-name="T1">union</text:span></text:span><text:span text:style-name="T1"> ditentukan oleh ukuran satu anggota terbesarnya. Memori dialokasikan cukup untuk menampung anggota yang paling memakan tempat. </text:span></text:p>
      <text:p text:style-name="P20">sizeof(union)=sizeof(anggota terbesar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6T07:52:49.794432267</meta:creation-date>
    <dc:date>2025-09-16T08:55:21.035267826</dc:date>
    <meta:editing-duration>PT13M29S</meta:editing-duration>
    <meta:editing-cycles>2</meta:editing-cycles>
    <meta:generator>LibreOffice/25.8.1.1$Linux_X86_64 LibreOffice_project/580$Build-1</meta:generator>
    <meta:document-statistic meta:table-count="0" meta:image-count="0" meta:object-count="0" meta:page-count="3" meta:paragraph-count="50" meta:word-count="665" meta:character-count="4506" meta:non-whitespace-character-count="3919"/>
  </office:meta>
</office:document-meta>
</file>