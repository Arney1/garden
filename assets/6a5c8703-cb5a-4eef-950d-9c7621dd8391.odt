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792in" style:rel-column-width="1410*"/>
    </style:style>
    <style:style style:name="Table1.B" style:family="table-column">
      <style:table-column-properties style:column-width="0.9993in" style:rel-column-width="1439*"/>
    </style:style>
    <style:style style:name="Table1.C" style:family="table-column">
      <style:table-column-properties style:column-width="0.9889in" style:rel-column-width="1424*"/>
    </style:style>
    <style:style style:name="Table1.D" style:family="table-column">
      <style:table-column-properties style:column-width="0.9896in" style:rel-column-width="1425*"/>
    </style:style>
    <style:style style:name="Table1.G" style:family="table-column">
      <style:table-column-properties style:column-width="0.9917in" style:rel-column-width="142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G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9792in" style:rel-column-width="1410*"/>
    </style:style>
    <style:style style:name="Table2.B" style:family="table-column">
      <style:table-column-properties style:column-width="0.9993in" style:rel-column-width="1439*"/>
    </style:style>
    <style:style style:name="Table2.C" style:family="table-column">
      <style:table-column-properties style:column-width="0.9889in" style:rel-column-width="1424*"/>
    </style:style>
    <style:style style:name="Table2.D" style:family="table-column">
      <style:table-column-properties style:column-width="0.9896in" style:rel-column-width="1425*"/>
    </style:style>
    <style:style style:name="Table2.G" style:family="table-column">
      <style:table-column-properties style:column-width="0.9917in" style:rel-column-width="142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G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G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6f1f6" officeooo:paragraph-rsid="0006f1f6"/>
    </style:style>
    <style:style style:name="P2" style:family="paragraph" style:parent-style-name="Table_20_Contents">
      <style:text-properties officeooo:rsid="0005dd4a" officeooo:paragraph-rsid="0005dd4a"/>
    </style:style>
    <style:style style:name="P3" style:family="paragraph" style:parent-style-name="Table_20_Contents">
      <style:text-properties officeooo:rsid="000c1985" officeooo:paragraph-rsid="000c1985"/>
    </style:style>
    <style:style style:name="P4" style:family="paragraph" style:parent-style-name="Table_20_Contents">
      <style:text-properties officeooo:rsid="00064104" officeooo:paragraph-rsid="00064104"/>
    </style:style>
    <style:style style:name="P5" style:family="paragraph" style:parent-style-name="Table_20_Contents">
      <style:text-properties officeooo:paragraph-rsid="000c1985"/>
    </style:style>
    <style:style style:name="P6" style:family="paragraph" style:parent-style-name="Table_20_Contents">
      <style:text-properties officeooo:rsid="00089a49" officeooo:paragraph-rsid="00089a49"/>
    </style:style>
    <style:style style:name="P7" style:family="paragraph" style:parent-style-name="Table_20_Contents">
      <style:text-properties officeooo:rsid="000a629b" officeooo:paragraph-rsid="000a629b"/>
    </style:style>
    <style:style style:name="P8" style:family="paragraph" style:parent-style-name="Table_20_Contents">
      <style:text-properties officeooo:rsid="0009a794" officeooo:paragraph-rsid="0009a794"/>
    </style:style>
    <style:style style:name="P9" style:family="paragraph" style:parent-style-name="Table_20_Contents">
      <style:text-properties officeooo:rsid="000d9c57" officeooo:paragraph-rsid="000d9c57"/>
    </style:style>
    <style:style style:name="P10" style:family="paragraph" style:parent-style-name="Table_20_Contents">
      <style:text-properties officeooo:rsid="0006f1f6" officeooo:paragraph-rsid="000e4641"/>
    </style:style>
    <style:style style:name="P11" style:family="paragraph" style:parent-style-name="Table_20_Contents">
      <style:text-properties officeooo:rsid="0005dd4a" officeooo:paragraph-rsid="000e4641"/>
    </style:style>
    <style:style style:name="P12" style:family="paragraph" style:parent-style-name="Table_20_Contents">
      <style:text-properties officeooo:paragraph-rsid="000e4641"/>
    </style:style>
    <style:style style:name="P13" style:family="paragraph" style:parent-style-name="Table_20_Contents">
      <style:text-properties officeooo:rsid="00064104" officeooo:paragraph-rsid="000e4641"/>
    </style:style>
    <style:style style:name="P14" style:family="paragraph" style:parent-style-name="Table_20_Contents">
      <style:text-properties officeooo:rsid="000c1985" officeooo:paragraph-rsid="000e4641"/>
    </style:style>
    <style:style style:name="P15" style:family="paragraph" style:parent-style-name="Table_20_Contents">
      <style:text-properties officeooo:rsid="00089a49" officeooo:paragraph-rsid="000e4641"/>
    </style:style>
    <style:style style:name="P16" style:family="paragraph" style:parent-style-name="Table_20_Contents">
      <style:text-properties officeooo:rsid="000a629b" officeooo:paragraph-rsid="000e4641"/>
    </style:style>
    <style:style style:name="P17" style:family="paragraph" style:parent-style-name="Table_20_Contents">
      <style:text-properties officeooo:rsid="0009a794" officeooo:paragraph-rsid="000e4641"/>
    </style:style>
    <style:style style:name="P18" style:family="paragraph" style:parent-style-name="Table_20_Contents">
      <style:text-properties officeooo:rsid="000d9c57" officeooo:paragraph-rsid="000e4641"/>
    </style:style>
    <style:style style:name="P19" style:family="paragraph" style:parent-style-name="Standard">
      <style:text-properties officeooo:paragraph-rsid="000e4641"/>
    </style:style>
    <style:style style:name="T1" style:family="text">
      <style:text-properties officeooo:rsid="0005dd4a"/>
    </style:style>
    <style:style style:name="T2" style:family="text">
      <style:text-properties officeooo:rsid="0006f1f6"/>
    </style:style>
    <style:style style:name="T3" style:family="text">
      <style:text-properties officeooo:rsid="00064104"/>
    </style:style>
    <style:style style:name="T4" style:family="text">
      <style:text-properties officeooo:rsid="000c1985"/>
    </style:style>
    <style:style style:name="T5" style:family="text">
      <style:text-properties officeooo:rsid="00089a49"/>
    </style:style>
    <style:style style:name="T6" style:family="text">
      <style:text-properties officeooo:rsid="0009a794"/>
    </style:style>
    <style:style style:name="T7" style:family="text">
      <style:text-properties fo:font-weight="normal" officeooo:rsid="000e4641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G"/>
        <table:table-row>
          <table:table-cell table:style-name="Table1.A1" office:value-type="string">
            <text:p text:style-name="P1">Bahasa</text:p>
          </table:table-cell>
          <table:table-cell table:style-name="Table1.A1" office:value-type="string">
            <text:p text:style-name="P2">Runtime</text:p>
          </table:table-cell>
          <table:table-cell table:style-name="Table1.A1" office:value-type="string">
            <text:p text:style-name="P2">Memori Digunakan</text:p>
          </table:table-cell>
          <table:table-cell table:style-name="Table1.A1" office:value-type="string">
            <text:p text:style-name="P2">Verbosity Kode (jml baris, char)</text:p>
          </table:table-cell>
          <table:table-cell table:style-name="Table1.A1" office:value-type="string">
            <text:p text:style-name="P2">Kemudahan debugging (subjektif, 1-5)</text:p>
          </table:table-cell>
          <table:table-cell table:style-name="Table1.A1" office:value-type="string">
            <text:p text:style-name="P2">Skalabilitas (performa naik turun saat input besar)</text:p>
          </table:table-cell>
          <table:table-cell table:style-name="Table1.G1" office:value-type="string">
            <text:p text:style-name="P2">Catatan trade-off</text:p>
          </table:table-cell>
        </table:table-row>
        <table:table-row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Table_20_Contents">Re<text:span text:style-name="T1">al: </text:span>0m0.004s</text:p>
            <text:p text:style-name="Table_20_Contents">use<text:span text:style-name="T1">r: </text:span>0m0.001s</text:p>
            <text:p text:style-name="Table_20_Contents">sy<text:span text:style-name="T1">s: </text:span>0m0.001s</text:p>
          </table:table-cell>
          <table:table-cell table:style-name="Table1.A2" office:value-type="string">
            <text:p text:style-name="Table_20_Contents"><text:span text:style-name="T2">Peak: </text:span>mem_heap_B=1024</text:p>
          </table:table-cell>
          <table:table-cell table:style-name="Table1.A2" office:value-type="string">
            <text:p text:style-name="P2">12 lines, 217 chars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Table_20_Contents">Real: 0m0.003s</text:p>
            <text:p text:style-name="Table_20_Contents">use<text:span text:style-name="T3">r: </text:span>0m0.000s</text:p>
            <text:p text:style-name="Table_20_Contents">sys: 0m0.003s</text:p>
            <text:p text:style-name="Table_20_Contents"/>
            <text:p text:style-name="P3">gabisa n = 10000</text:p>
            <text:p text:style-name="Table_20_Contents"/>
            <text:p text:style-name="P4">tetap sangat cepat performanya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Python</text:p>
          </table:table-cell>
          <table:table-cell table:style-name="Table1.A2" office:value-type="string">
            <text:p text:style-name="Table_20_Contents">Real: 0m0.048s</text:p>
            <text:p text:style-name="Table_20_Contents">user: 0m0.036s</text:p>
            <text:p text:style-name="Table_20_Contents">sys: 0m0.010s</text:p>
          </table:table-cell>
          <table:table-cell table:style-name="Table1.A2" office:value-type="string">
            <text:p text:style-name="P1">Peak: mem_heap_B=1488039</text:p>
          </table:table-cell>
          <table:table-cell table:style-name="Table1.A2" office:value-type="string">
            <text:p text:style-name="P4">9 llines, 175 chars</text:p>
          </table:table-cell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Table_20_Contents"><text:span text:style-name="T4">N=50<text:line-break/></text:span>Real: 0m0.057s</text:p>
            <text:p text:style-name="Table_20_Contents">user: 0m0.037s</text:p>
            <text:p text:style-name="Table_20_Contents">sys: 0m0.015s</text:p>
            <text:p text:style-name="Table_20_Contents"><text:line-break/><text:span text:style-name="T4">n = 10000<text:line-break/>real<text:tab/>0m0.092s</text:span></text:p>
            <text:p text:style-name="Table_20_Contents">user<text:tab/>0m0.075s</text:p>
            <text:p text:style-name="Table_20_Contents">sys<text:tab/>0m0.013s</text:p>
            <text:p text:style-name="P1">makin lambat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Prolog</text:p>
          </table:table-cell>
          <table:table-cell table:style-name="Table1.A2" office:value-type="string">
            <text:p text:style-name="Table_20_Contents">% 14 inferences, 0.000 CPU in 0.000 seconds (94% CPU, 1157790 Lips)</text:p>
          </table:table-cell>
          <table:table-cell table:style-name="Table1.A2" office:value-type="string">
            <text:p text:style-name="Table_20_Contents">?- statistics(globalused, MemBefore),</text:p>
            <text:p text:style-name="Table_20_Contents">| <text:s text:c="6"/>factorial(5, Result),</text:p>
            <text:p text:style-name="Table_20_Contents">| <text:s text:c="6"/>statistics(globalused, <text:soft-page-break/>MemAfter),</text:p>
            <text:p text:style-name="Table_20_Contents">| <text:s text:c="6"/>MemUsed is MemAfter - MemBefore,</text:p>
            <text:p text:style-name="Table_20_Contents">| <text:s text:c="6"/>format('Result = ~w~nGlobal memory used = ~d bytes~n', [Result, MemUsed]).</text:p>
            <text:p text:style-name="Table_20_Contents">Result = 120</text:p>
            <text:p text:style-name="Table_20_Contents">Global memory used = 160 bytes</text:p>
            <text:p text:style-name="Table_20_Contents">MemBefore = 23040,</text:p>
            <text:p text:style-name="Table_20_Contents">Result = 120,</text:p>
            <text:p text:style-name="Table_20_Contents">MemAfter = 23200,</text:p>
            <text:p text:style-name="Table_20_Contents">MemUsed = 160 .<text:line-break/><text:line-break/><text:span text:style-name="T2">160 byte</text:span></text:p>
          </table:table-cell>
          <table:table-cell table:style-name="Table1.A2" office:value-type="string">
            <text:p text:style-name="P4">7 lines, 104 chars</text:p>
          </table:table-cell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5"><text:span text:style-name="T4">N = 50:</text:span></text:p>
            <text:p text:style-name="P5">?- time(factorial(50, Result)).</text:p>
            <text:p text:style-name="Table_20_Contents">% 148 inferences, 0.000 CPU in 0.000 seconds (92% CPU, <text:soft-page-break/>3055326 Lips)</text:p>
            <text:p text:style-name="Table_20_Contents"/>
            <text:p text:style-name="P4">tetap sangat cepat performanya</text:p>
            <text:p text:style-name="P4"/>
            <text:p text:style-name="P3">n = 10000</text:p>
            <text:p text:style-name="P4">% 29,999 inferences, 0.074 CPU in 0.074 seconds (100% CPU, 407954 Lips)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SQL <text:span text:style-name="T5">(let’s use postgreSQL)</text:span></text:p>
          </table:table-cell>
          <table:table-cell table:style-name="Table1.A2" office:value-type="string">
            <text:p text:style-name="Table_20_Contents"><text:s/>Planning Time: 0.113 ms</text:p>
            <text:p text:style-name="Table_20_Contents"><text:s/>Execution Time: 0.204 ms</text:p>
          </table:table-cell>
          <table:table-cell table:style-name="Table1.A2" office:value-type="string">
            <text:p text:style-name="Table_20_Contents">mem_heap_B=58840</text:p>
          </table:table-cell>
          <table:table-cell table:style-name="Table1.A2" office:value-type="string">
            <text:p text:style-name="P6">128 chars</text:p>
          </table:table-cell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6">Susah karena ini query based yang dimana itu tuh….. <text:span text:style-name="T6">taid dicobain dinaikin ke 50 return malah 0</text:span>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Scala</text:p>
          </table:table-cell>
          <table:table-cell table:style-name="Table1.A2" office:value-type="string">
            <text:p text:style-name="Table_20_Contents">real<text:tab/>0m5.045s</text:p>
            <text:p text:style-name="Table_20_Contents">user<text:tab/>0m10.224s</text:p>
            <text:p text:style-name="Table_20_Contents">sys<text:tab/>0m1.115s</text:p>
          </table:table-cell>
          <table:table-cell table:style-name="Table1.A2" office:value-type="string">
            <text:p text:style-name="P7">mem_heap_B=92337</text:p>
          </table:table-cell>
          <table:table-cell table:style-name="Table1.A2" office:value-type="string">
            <text:p text:style-name="P8">7 lines, 155 chars</text:p>
          </table:table-cell>
          <table:table-cell table:style-name="Table1.A2" office:value-type="string">
            <text:p text:style-name="P8">3</text:p>
          </table:table-cell>
          <table:table-cell table:style-name="Table1.A2" office:value-type="string">
            <text:p text:style-name="P3">N = 50:</text:p>
            <text:p text:style-name="P6">real<text:tab/>0m4.459s</text:p>
            <text:p text:style-name="P6">user<text:tab/>0m9.906s</text:p>
            <text:p text:style-name="P6">sys 0m0.919s</text:p>
            <text:p text:style-name="P6"/>
            <text:p text:style-name="P3">n = 10000</text:p>
            <text:p text:style-name="P6">real<text:soft-page-break/><text:tab/>0m5.592s</text:p>
            <text:p text:style-name="P6">user<text:tab/>0m8.725s</text:p>
            <text:p text:style-name="P6">sys<text:tab/>0m1.163s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Haskell</text:p>
          </table:table-cell>
          <table:table-cell table:style-name="Table1.A2" office:value-type="string">
            <text:p text:style-name="Table_20_Contents">real<text:tab/>0m0.004s</text:p>
            <text:p text:style-name="Table_20_Contents">user<text:tab/>0m0.000s</text:p>
            <text:p text:style-name="Table_20_Contents">sys<text:tab/>0m0.004s</text:p>
          </table:table-cell>
          <table:table-cell table:style-name="Table1.A2" office:value-type="string">
            <text:p text:style-name="P7">mem_heap_B=4255094</text:p>
          </table:table-cell>
          <table:table-cell table:style-name="Table1.A2" office:value-type="string">
            <text:p text:style-name="P9">5 lines, 111 chars</text:p>
          </table:table-cell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9">N = 10000</text:p>
            <text:p text:style-name="P9">real<text:tab/>0m0.069s</text:p>
            <text:p text:style-name="P9">user<text:tab/>0m0.022s</text:p>
            <text:p text:style-name="P9">sys<text:tab/>0m0.047s</text:p>
          </table:table-cell>
          <table:table-cell table:style-name="Table1.G2" office:value-type="string">
            <text:p text:style-name="Table_20_Contents"/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G"/>
        <table:table-row>
          <table:table-cell table:style-name="Table2.A1" office:value-type="string">
            <text:p text:style-name="P10">Bahasa</text:p>
          </table:table-cell>
          <table:table-cell table:style-name="Table2.A1" office:value-type="string">
            <text:p text:style-name="P11">Runtime</text:p>
          </table:table-cell>
          <table:table-cell table:style-name="Table2.A1" office:value-type="string">
            <text:p text:style-name="P11">Memori Digunakan</text:p>
          </table:table-cell>
          <table:table-cell table:style-name="Table2.A1" office:value-type="string">
            <text:p text:style-name="P11">Verbosity Kode (jml baris, char)</text:p>
          </table:table-cell>
          <table:table-cell table:style-name="Table2.A1" office:value-type="string">
            <text:p text:style-name="P11">Kemudahan debugging (subjektif, 1-5)</text:p>
          </table:table-cell>
          <table:table-cell table:style-name="Table2.A1" office:value-type="string">
            <text:p text:style-name="P11">Skalabilitas (performa naik turun saat input besar)</text:p>
          </table:table-cell>
          <table:table-cell table:style-name="Table2.G1" office:value-type="string">
            <text:p text:style-name="P11">Catatan trade-off</text:p>
          </table:table-cell>
        </table:table-row>
        <table:table-row>
          <table:table-cell table:style-name="Table2.A2" office:value-type="string">
            <text:p text:style-name="P11">C</text:p>
          </table:table-cell>
          <table:table-cell table:style-name="Table2.A2" office:value-type="string">
            <text:p text:style-name="P12">~0.004s</text:p>
          </table:table-cell>
          <table:table-cell table:style-name="Table2.A2" office:value-type="string">
            <text:p text:style-name="P12">~1 KB</text:p>
          </table:table-cell>
          <table:table-cell table:style-name="Table2.A2" office:value-type="string">
            <text:p text:style-name="P11">12 lines, 217 chars</text:p>
          </table:table-cell>
          <table:table-cell table:style-name="Table2.A2" office:value-type="string">
            <text:p text:style-name="P11">3</text:p>
          </table:table-cell>
          <table:table-cell table:style-name="Table2.A2" office:value-type="string">
            <text:p text:style-name="P12"><text:span text:style-name="Strong_20_Emphasis"><text:span text:style-name="T7">Terbatas</text:span></text:span><text:span text:style-name="T8"> (</text:span><text:span text:style-name="T7">tipe data tidak bisa menyimpan angka besar</text:span><text:span text:style-name="T8">)</text:span></text:p>
          </table:table-cell>
          <table:table-cell table:style-name="Table2.G2" office:value-type="string">
            <text:p text:style-name="P12">Super cepat, memori kecil, tapi lebih verbose dan debugging agak susah. Cocok untuk high-performance.</text:p>
          </table:table-cell>
        </table:table-row>
        <table:table-row>
          <table:table-cell table:style-name="Table2.A2" office:value-type="string">
            <text:p text:style-name="P11">Python</text:p>
          </table:table-cell>
          <table:table-cell table:style-name="Table2.A2" office:value-type="string">
            <text:p text:style-name="P12">~0.05s</text:p>
          </table:table-cell>
          <table:table-cell table:style-name="Table2.A2" office:value-type="string">
            <text:p text:style-name="P10">~1.4 MB</text:p>
          </table:table-cell>
          <table:table-cell table:style-name="Table2.A2" office:value-type="string">
            <text:p text:style-name="P13">9 llines, 175 chars</text:p>
          </table:table-cell>
          <table:table-cell table:style-name="Table2.A2" office:value-type="string">
            <text:p text:style-name="P13">5</text:p>
          </table:table-cell>
          <table:table-cell table:style-name="Table2.A2" office:value-type="string">
            <text:p text:style-name="P10"><text:span text:style-name="Strong_20_Emphasis"><text:span text:style-name="T8">Kurang baik</text:span></text:span><text:span text:style-name="T8"> (lambat saat input besar)</text:span></text:p>
          </table:table-cell>
          <table:table-cell table:style-name="Table2.G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1">Prolog</text:p>
          </table:table-cell>
          <table:table-cell table:style-name="Table2.A2" office:value-type="string">
            <text:p text:style-name="P12">% 14 inferences, 0.000 CPU in 0.000 seconds (94% CPU, 1157790 Lips)</text:p>
          </table:table-cell>
          <table:table-cell table:style-name="Table2.A2" office:value-type="string">
            <text:p text:style-name="P12">?- statistics(globalused, MemBefore),</text:p>
            <text:p text:style-name="P12">| <text:s text:c="6"/>factorial(5, Result),</text:p>
            <text:p text:style-name="P12">| <text:s text:c="6"/>statistics(glo<text:soft-page-break/>balused, MemAfter),</text:p>
            <text:p text:style-name="P12">| <text:s text:c="6"/>MemUsed is MemAfter - MemBefore,</text:p>
            <text:p text:style-name="P12">| <text:s text:c="6"/>format('Result = ~w~nGlobal memory used = ~d bytes~n', [Result, MemUsed]).</text:p>
            <text:p text:style-name="P12">Result = 120</text:p>
            <text:p text:style-name="P12">Global memory used = 160 bytes</text:p>
            <text:p text:style-name="P12">MemBefore = 23040,</text:p>
            <text:p text:style-name="P12">Result = 120,</text:p>
            <text:p text:style-name="P12">MemAfter = 23200,</text:p>
            <text:p text:style-name="P12">MemUsed = 160 .<text:line-break/><text:line-break/><text:span text:style-name="T2">160 byte</text:span></text:p>
          </table:table-cell>
          <table:table-cell table:style-name="Table2.A2" office:value-type="string">
            <text:p text:style-name="P13">7 lines, 104 chars</text:p>
          </table:table-cell>
          <table:table-cell table:style-name="Table2.A2" office:value-type="string">
            <text:p text:style-name="P13">3</text:p>
          </table:table-cell>
          <table:table-cell table:style-name="Table2.A2" office:value-type="string">
            <text:p text:style-name="P12"><text:span text:style-name="T4">N = 50:</text:span></text:p>
            <text:p text:style-name="P12">?- time(factorial(50, Result)).</text:p>
            <text:p text:style-name="P12">% 148 inferences, 0.000 CPU in 0.000 seconds <text:soft-page-break/>(92% CPU, 3055326 Lips)</text:p>
            <text:p text:style-name="P12"/>
            <text:p text:style-name="P13">tetap sangat cepat performanya</text:p>
            <text:p text:style-name="P13"/>
            <text:p text:style-name="P14">n = 10000</text:p>
            <text:p text:style-name="P13">% 29,999 inferences, 0.074 CPU in 0.074 seconds (100% CPU, 407954 Lips)</text:p>
          </table:table-cell>
          <table:table-cell table:style-name="Table2.G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1">SQL <text:span text:style-name="T5">(let’s use postgreSQL)</text:span></text:p>
          </table:table-cell>
          <table:table-cell table:style-name="Table2.A2" office:value-type="string">
            <text:p text:style-name="P12"><text:s/>Planning Time: 0.113 ms</text:p>
            <text:p text:style-name="P12"><text:s/>Execution Time: 0.204 ms</text:p>
          </table:table-cell>
          <table:table-cell table:style-name="Table2.A2" office:value-type="string">
            <text:p text:style-name="P12">mem_heap_B=58840</text:p>
          </table:table-cell>
          <table:table-cell table:style-name="Table2.A2" office:value-type="string">
            <text:p text:style-name="P15">128 chars</text:p>
          </table:table-cell>
          <table:table-cell table:style-name="Table2.A2" office:value-type="string">
            <text:p text:style-name="P13">3</text:p>
          </table:table-cell>
          <table:table-cell table:style-name="Table2.A2" office:value-type="string">
            <text:p text:style-name="P15">Susah karena ini query based yang dimana itu tuh….. <text:span text:style-name="T6">taid dicobain dinaikin ke 50 return malah 0</text:span></text:p>
          </table:table-cell>
          <table:table-cell table:style-name="Table2.G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5">Scala</text:p>
          </table:table-cell>
          <table:table-cell table:style-name="Table2.A2" office:value-type="string">
            <text:p text:style-name="P12">real<text:tab/>0m5.045s</text:p>
            <text:p text:style-name="P12">user<text:tab/>0m10.224s</text:p>
            <text:p text:style-name="P12">sys<text:tab/>0m1.115s</text:p>
          </table:table-cell>
          <table:table-cell table:style-name="Table2.A2" office:value-type="string">
            <text:p text:style-name="P16">mem_heap_B=92337</text:p>
          </table:table-cell>
          <table:table-cell table:style-name="Table2.A2" office:value-type="string">
            <text:p text:style-name="P17">7 lines, 155 chars</text:p>
          </table:table-cell>
          <table:table-cell table:style-name="Table2.A2" office:value-type="string">
            <text:p text:style-name="P17">3</text:p>
          </table:table-cell>
          <table:table-cell table:style-name="Table2.A2" office:value-type="string">
            <text:p text:style-name="P14">N = 50:</text:p>
            <text:p text:style-name="P15">real<text:tab/>0m4.459s</text:p>
            <text:p text:style-name="P15">user<text:tab/>0m9.906s</text:p>
            <text:p text:style-name="P15">sys 0m0.919s</text:p>
            <text:p text:style-name="P15"/>
            <text:p text:style-name="P14">n = 10000</text:p>
            <text:p text:style-name="P15"><text:soft-page-break/>real<text:tab/>0m5.592s</text:p>
            <text:p text:style-name="P15">user<text:tab/>0m8.725s</text:p>
            <text:p text:style-name="P15">sys<text:tab/>0m1.163s</text:p>
          </table:table-cell>
          <table:table-cell table:style-name="Table2.G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6">Haskell</text:p>
          </table:table-cell>
          <table:table-cell table:style-name="Table2.A2" office:value-type="string">
            <text:p text:style-name="P12">real<text:tab/>0m0.004s</text:p>
            <text:p text:style-name="P12">user<text:tab/>0m0.000s</text:p>
            <text:p text:style-name="P12">sys<text:tab/>0m0.004s</text:p>
          </table:table-cell>
          <table:table-cell table:style-name="Table2.A2" office:value-type="string">
            <text:p text:style-name="P16">mem_heap_B=4255094</text:p>
          </table:table-cell>
          <table:table-cell table:style-name="Table2.A2" office:value-type="string">
            <text:p text:style-name="P18">5 lines, 111 chars</text:p>
          </table:table-cell>
          <table:table-cell table:style-name="Table2.A2" office:value-type="string">
            <text:p text:style-name="P18">2</text:p>
          </table:table-cell>
          <table:table-cell table:style-name="Table2.A2" office:value-type="string">
            <text:p text:style-name="P18">N = 10000</text:p>
            <text:p text:style-name="P18">real<text:tab/>0m0.069s</text:p>
            <text:p text:style-name="P18">user<text:tab/>0m0.022s</text:p>
            <text:p text:style-name="P18">sys<text:tab/>0m0.047s</text:p>
          </table:table-cell>
          <table:table-cell table:style-name="Table2.G2" office:value-type="string">
            <text:p text:style-name="P12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6T08:15:36.642589189</meta:creation-date>
    <dc:date>2025-08-26T11:24:19.330027256</dc:date>
    <meta:editing-duration>PT15M17S</meta:editing-duration>
    <meta:editing-cycles>1</meta:editing-cycles>
    <meta:document-statistic meta:table-count="2" meta:image-count="0" meta:object-count="0" meta:page-count="5" meta:paragraph-count="161" meta:word-count="532" meta:character-count="3257" meta:non-whitespace-character-count="2831"/>
    <meta:generator>LibreOffice/25.8.0.4$Linux_X86_64 LibreOffice_project/580$Build-4</meta:generator>
  </office:meta>
</office:document-meta>
</file>