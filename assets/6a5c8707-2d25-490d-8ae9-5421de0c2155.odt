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9000001EE2BE1377B.png" manifest:media-type="image/png"/>
  <manifest:file-entry manifest:full-path="Pictures/10000000000001C90000009EFB31175F.png" manifest:media-type="image/png"/>
  <manifest:file-entry manifest:full-path="Pictures/1000000000000196000002F7F151D9CB.png" manifest:media-type="image/png"/>
  <manifest:file-entry manifest:full-path="Pictures/1000000000000757000004368D07E671.png" manifest:media-type="image/png"/>
  <manifest:file-entry manifest:full-path="Pictures/10000000000001FF00000177E3E260C9.png" manifest:media-type="image/png"/>
  <manifest:file-entry manifest:full-path="Pictures/10000000000004F00000042786A1FBD7.png" manifest:media-type="image/png"/>
  <manifest:file-entry manifest:full-path="Pictures/10000000000004E90000043209E703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0527" officeooo:paragraph-rsid="00130527"/>
    </style:style>
    <style:style style:name="P2" style:family="paragraph" style:parent-style-name="Heading_20_1">
      <style:text-properties officeooo:paragraph-rsid="001652e2"/>
    </style:style>
    <style:style style:name="P3" style:family="paragraph" style:parent-style-name="Heading_20_2">
      <style:text-properties officeooo:rsid="001652e2" officeooo:paragraph-rsid="001652e2"/>
    </style:style>
    <style:style style:name="P4" style:family="paragraph" style:parent-style-name="Heading_20_3">
      <style:text-properties officeooo:paragraph-rsid="001652e2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652e2" officeooo:paragraph-rsid="001652e2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Liberation Mono" officeooo:rsid="001652e2" officeooo:paragraph-rsid="001652e2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7cc74" officeooo:paragraph-rsid="0017cc74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Liberation Mono" officeooo:rsid="0017cc74" officeooo:paragraph-rsid="0017cc74"/>
    </style:style>
    <style:style style:name="P9" style:family="paragraph" style:parent-style-name="Heading_20_3">
      <style:paragraph-properties fo:text-align="justify" style:justify-single-word="false"/>
      <style:text-properties officeooo:rsid="0017cc74" officeooo:paragraph-rsid="0017cc74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rsid="0017cc74" officeooo:paragraph-rsid="0017cc74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rsid="0019b817" officeooo:paragraph-rsid="0019b817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weight="normal" officeooo:rsid="0017cc74" officeooo:paragraph-rsid="0017cc74" style:font-weight-asian="normal" style:font-weight-complex="normal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font-weight="normal" officeooo:rsid="00130527" officeooo:paragraph-rsid="0017cc74" style:font-weight-asian="normal" style:font-weight-complex="normal"/>
    </style:style>
    <style:style style:name="P14" style:family="paragraph" style:parent-style-name="Text_20_body" style:list-style-name="L2">
      <style:paragraph-properties fo:line-height="115%" fo:text-align="justify" style:justify-single-word="false"/>
      <style:text-properties officeooo:rsid="00130527" officeooo:paragraph-rsid="0017cc74"/>
    </style:style>
    <style:style style:name="P15" style:family="paragraph" style:parent-style-name="Heading_20_2">
      <style:text-properties officeooo:rsid="0017cc74" officeooo:paragraph-rsid="0017cc74"/>
    </style:style>
    <style:style style:name="P16" style:family="paragraph" style:parent-style-name="Standard">
      <style:paragraph-properties fo:line-height="115%"/>
      <style:text-properties officeooo:rsid="0013649f" officeooo:paragraph-rsid="0013649f"/>
    </style:style>
    <style:style style:name="P17" style:family="paragraph" style:parent-style-name="Table_20_Contents">
      <style:text-properties officeooo:rsid="001652e2" officeooo:paragraph-rsid="001652e2"/>
    </style:style>
    <style:style style:name="P18" style:family="paragraph" style:parent-style-name="Table_20_Contents">
      <style:paragraph-properties fo:text-align="justify" style:justify-single-word="false"/>
      <style:text-properties officeooo:rsid="001652e2" officeooo:paragraph-rsid="001652e2"/>
    </style:style>
    <style:style style:name="P19" style:family="paragraph" style:parent-style-name="Standard">
      <style:paragraph-properties fo:line-height="115%" fo:text-align="justify" style:justify-single-word="false"/>
      <style:text-properties fo:font-weight="normal" officeooo:rsid="0013649f" officeooo:paragraph-rsid="001652e2" style:font-weight-asian="normal" style:font-weight-complex="normal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officeooo:rsid="0017cc74" officeooo:paragraph-rsid="0017cc74"/>
    </style:style>
    <style:style style:name="P22" style:family="paragraph" style:parent-style-name="Standard" style:list-style-name="L3">
      <style:paragraph-properties fo:line-height="115%"/>
      <style:text-properties officeooo:rsid="0013649f" officeooo:paragraph-rsid="0013649f"/>
    </style:style>
    <style:style style:name="P23" style:family="paragraph" style:parent-style-name="Text_20_body">
      <style:text-properties officeooo:rsid="00199885" officeooo:paragraph-rsid="00199885"/>
    </style:style>
    <style:style style:name="P24" style:family="paragraph" style:parent-style-name="Text_20_body" style:list-style-name="L4">
      <style:text-properties officeooo:rsid="00199885" officeooo:paragraph-rsid="00199885"/>
    </style:style>
    <style:style style:name="P25" style:family="paragraph" style:parent-style-name="Heading_20_2">
      <style:text-properties officeooo:rsid="00199885" officeooo:paragraph-rsid="00199885"/>
    </style:style>
    <style:style style:name="P26" style:family="paragraph" style:parent-style-name="Text_20_body">
      <style:text-properties officeooo:rsid="001c508b" officeooo:paragraph-rsid="001c508b"/>
    </style:style>
    <style:style style:name="P27" style:family="paragraph" style:parent-style-name="Heading_20_1">
      <style:text-properties officeooo:paragraph-rsid="001c508b"/>
    </style:style>
    <style:style style:name="P28" style:family="paragraph" style:parent-style-name="Heading_20_2">
      <style:text-properties officeooo:rsid="001c508b" officeooo:paragraph-rsid="001c508b"/>
    </style:style>
    <style:style style:name="P29" style:family="paragraph" style:parent-style-name="Heading_20_3">
      <style:text-properties officeooo:rsid="001c508b" officeooo:paragraph-rsid="001c508b"/>
    </style:style>
    <style:style style:name="P30" style:family="paragraph" style:parent-style-name="Text_20_body">
      <style:text-properties fo:font-weight="normal" officeooo:rsid="001c508b" officeooo:paragraph-rsid="001c508b" style:font-weight-asian="normal" style:font-weight-complex="normal"/>
    </style:style>
    <style:style style:name="P31" style:family="paragraph" style:parent-style-name="Text_20_body" style:list-style-name="L5">
      <style:text-properties fo:font-weight="normal" officeooo:rsid="001c508b" officeooo:paragraph-rsid="001c508b" style:font-weight-asian="normal" style:font-weight-complex="normal"/>
    </style:style>
    <style:style style:name="P32" style:family="paragraph" style:parent-style-name="Text_20_body" style:list-style-name="L5">
      <style:text-properties officeooo:paragraph-rsid="001c508b"/>
    </style:style>
    <style:style style:name="P33" style:family="paragraph" style:parent-style-name="Heading_20_3">
      <style:text-properties officeooo:paragraph-rsid="001c508b"/>
    </style:style>
    <style:style style:name="P34" style:family="paragraph" style:parent-style-name="Text_20_body">
      <style:text-properties officeooo:paragraph-rsid="001c508b"/>
    </style:style>
    <style:style style:name="P35" style:family="paragraph" style:parent-style-name="Heading_20_2">
      <style:text-properties officeooo:paragraph-rsid="001e422c"/>
    </style:style>
    <style:style style:name="P36" style:family="paragraph" style:parent-style-name="Text_20_body">
      <style:text-properties officeooo:paragraph-rsid="001f5566"/>
    </style:style>
    <style:style style:name="P37" style:family="paragraph" style:parent-style-name="Table_20_Contents">
      <style:text-properties officeooo:rsid="001f5566" officeooo:paragraph-rsid="001f5566"/>
    </style:style>
    <style:style style:name="P38" style:family="paragraph" style:parent-style-name="Table_20_Contents">
      <style:text-properties officeooo:paragraph-rsid="001f5566"/>
    </style:style>
    <style:style style:name="P39" style:family="paragraph" style:parent-style-name="Table_20_Contents">
      <style:text-properties fo:font-weight="normal" officeooo:paragraph-rsid="001f5566" style:font-weight-asian="normal" style:font-weight-complex="normal"/>
    </style:style>
    <style:style style:name="P40" style:family="paragraph" style:parent-style-name="Table_20_Contents">
      <style:text-properties fo:font-weight="normal" style:font-weight-asian="normal" style:font-weight-complex="normal"/>
    </style:style>
    <style:style style:name="P41" style:family="paragraph" style:parent-style-name="Heading_20_2">
      <style:text-properties officeooo:paragraph-rsid="001f5566"/>
    </style:style>
    <style:style style:name="P42" style:family="paragraph" style:parent-style-name="Table_20_Contents">
      <style:text-properties officeooo:rsid="001652e2" officeooo:paragraph-rsid="001f5566"/>
    </style:style>
    <style:style style:name="P43" style:family="paragraph" style:parent-style-name="Table_20_Contents">
      <style:paragraph-properties fo:text-align="justify" style:justify-single-word="false"/>
      <style:text-properties officeooo:rsid="001652e2" officeooo:paragraph-rsid="001f5566"/>
    </style:style>
    <style:style style:name="P44" style:family="paragraph" style:parent-style-name="Standard">
      <style:paragraph-properties fo:line-height="115%" fo:text-align="justify" style:justify-single-word="false"/>
      <style:text-properties fo:font-weight="normal" officeooo:rsid="0013649f" officeooo:paragraph-rsid="001f5566" style:font-weight-asian="normal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officeooo:paragraph-rsid="001f5566"/>
    </style:style>
    <style:style style:name="P46" style:family="paragraph" style:parent-style-name="Table_20_Contents">
      <style:paragraph-properties fo:text-align="justify" style:justify-single-word="false"/>
      <style:text-properties officeooo:rsid="0017cc74" officeooo:paragraph-rsid="001f5566"/>
    </style:style>
    <style:style style:name="P47" style:family="paragraph" style:parent-style-name="Standard">
      <style:text-properties officeooo:paragraph-rsid="001f5566"/>
    </style:style>
    <style:style style:name="T1" style:family="text">
      <style:text-properties officeooo:rsid="001652e2"/>
    </style:style>
    <style:style style:name="T2" style:family="text">
      <style:text-properties officeooo:rsid="0017cc7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officeooo:rsid="001a9847"/>
    </style:style>
    <style:style style:name="T7" style:family="text">
      <style:text-properties officeooo:rsid="001c508b"/>
    </style:style>
    <style:style style:name="T8" style:family="text">
      <style:text-properties fo:font-weight="normal" officeooo:rsid="001c508b" style:font-weight-asian="normal" style:font-weight-complex="normal"/>
    </style:style>
    <style:style style:name="T9" style:family="text">
      <style:text-properties style:font-name="Liberation Serif" officeooo:rsid="001c508b"/>
    </style:style>
    <style:style style:name="T10" style:family="text">
      <style:text-properties style:font-name="Liberation Sans" officeooo:rsid="001c508b"/>
    </style:style>
    <style:style style:name="T11" style:family="text">
      <style:text-properties style:font-name="Liberation Sans" officeooo:rsid="001e422c"/>
    </style:style>
    <style:style style:name="T12" style:family="text">
      <style:text-properties style:font-name="Liberation Sans" officeooo:rsid="001f5566"/>
    </style:style>
    <style:style style:name="T13" style:family="text">
      <style:text-properties style:font-name="Liberation Serif" officeooo:rsid="001f5566"/>
    </style:style>
    <style:style style:name="T14" style:family="text">
      <style:text-properties fo:font-weight="normal" officeooo:rsid="001f5566" style:font-weight-asian="normal" style:font-weight-complex="normal"/>
    </style:style>
    <style:style style:name="T15" style:family="text">
      <style:text-properties officeooo:rsid="001f556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434_611367773"/>NIM: 241524033</text:p>
      <text:p text:style-name="P1">Nama: Arkan Ramadhan Nugraha</text:p>
      <text:p text:style-name="P1">Kelas: 2B-TI4</text:p>
      <text:p text:style-name="P1">Mata Kuliah: Programming Language Pragmatics</text:p>
      <text:p text:style-name="P1"/>
      <text:h text:style-name="P2" text:outline-level="1"><text:span text:style-name="T1">1. Analisis Bahasa Pemrograman Robot Kaja</text:span></text:h>
      <text:h text:style-name="P3" text:outline-level="2">a) Sintaks dan Semantik Bahasa Robot Kaja</text:h>
      <text:h text:style-name="P4" text:outline-level="3"><text:span text:style-name="T1">Sintaks</text:span></text:h>
      <text:list text:style-name="L1">
        <text:list-item>
          <text:p text:style-name="P5">Struktur Program Utama</text:p>
          <text:list>
            <text:list-item>
              <text:p text:style-name="P5">Setiap program utama dimulai dengan</text:p>
              <text:p text:style-name="P6">Script &lt;Script<text:span text:style-name="T2">Name</text:span>&gt; runs as</text:p>
              <text:p text:style-name="P6"><text:s text:c="4"/>...code...</text:p>
              <text:p text:style-name="P6">end</text:p>
            </text:list-item>
            <text:list-item>
              <text:p text:style-name="P5">Kata kunci runs as menunjukkan bahwa skrip ini dapat dijalankan sebagai entitas utama</text:p>
            </text:list-item>
          </text:list>
        </text:list-item>
        <text:list-item>
          <text:p text:style-name="P5">Pemuatan Modul</text:p>
          <text:p text:style-name="P5">Menggunakan kata kunci require &lt;library_name&gt; untuk mengimpor pustaka eksternal.</text:p>
          <text:p text:style-name="P6">require &lt;Library<text:span text:style-name="T2">Name</text:span>&gt;</text:p>
        </text:list-item>
        <text:list-item>
          <text:p text:style-name="P5">Definisi Routine</text:p>
          <text:p text:style-name="P5">Digunakan untuk membuat prosedur yang dapat dipanggil kembali (reusable).</text:p>
          <text:p text:style-name="P6">routine &lt;Routine<text:span text:style-name="T2">Name</text:span>&gt; means</text:p>
          <text:p text:style-name="P6"><text:s text:c="4"/>...code...</text:p>
          <text:p text:style-name="P6">end</text:p>
        </text:list-item>
        <text:list-item>
          <text:p text:style-name="P5">Pemanggilan Rutin dari Library</text:p>
          <text:p text:style-name="P5">Pemanggilan fungsi dari library menggunakan:</text:p>
          <text:p text:style-name="P6">&lt;NamaRoutine&gt;</text:p>
        </text:list-item>
        <text:list-item>
          <text:p text:style-name="P5">Perulangan</text:p>
          <text:list>
            <text:list-item>
              <text:p text:style-name="P7">Berdasarkan Kondisi</text:p>
              <text:p text:style-name="P8">while &lt;condition&gt; do</text:p>
              <text:p text:style-name="P8"><text:s text:c="4"/><text:bookmark-start text:name="__DdeLink__436_611367773"/>...action...<text:bookmark-end text:name="__DdeLink__436_611367773"/></text:p>
              <text:p text:style-name="P8">end</text:p>
            </text:list-item>
            <text:list-item>
              <text:p text:style-name="P7"><text:soft-page-break/>Berulang tetap</text:p>
              <text:p text:style-name="P8">repeat &lt;total&gt; times</text:p>
              <text:p text:style-name="P8"><text:s text:c="4"/>...action...</text:p>
              <text:p text:style-name="P8">end</text:p>
            </text:list-item>
          </text:list>
        </text:list-item>
        <text:list-item>
          <text:p text:style-name="P5">Percabangan</text:p>
          <text:p text:style-name="P6">if &lt;<text:span text:style-name="T2">condition</text:span>&gt; do</text:p>
          <text:p text:style-name="P6"><text:s text:c="4"/>...<text:span text:style-name="T2">action if true</text:span>...</text:p>
          <text:p text:style-name="P6">end else do</text:p>
          <text:p text:style-name="P6"><text:s text:c="4"/>...a<text:span text:style-name="T2">ction if false</text:span>...</text:p>
          <text:p text:style-name="P6">end</text:p>
        </text:list-item>
        <text:list-item>
          <text:p text:style-name="P5">Komentar</text:p>
          <text:p text:style-name="P5">Menggunakan <text:span text:style-name="Source_20_Text">#</text:span> di awal baris, contoh:</text:p>
          <text:p text:style-name="P6"># This is a comment</text:p>
        </text:list-item>
        <text:list-item>
          <text:p text:style-name="P5">Tracing / Output</text:p>
          <text:p text:style-name="P6">trace -&gt; &lt;<text:span text:style-name="T2">message</text:span>&gt; ←</text:p>
        </text:list-item>
      </text:list>
      <text:h text:style-name="P9" text:outline-level="3">Semantik</text:h>
      <text:list text:style-name="L2">
        <text:list-item>
          <text:p text:style-name="P10">Gerakan Dasar</text:p>
          <text:list>
            <text:list-item>
              <text:p text:style-name="P10">step: robot maju satu petak</text:p>
            </text:list-item>
            <text:list-item>
              <text:p text:style-name="P10">turnLeft: berputar 90 derajat ke kiri</text:p>
            </text:list-item>
          </text:list>
        </text:list-item>
        <text:list-item>
          <text:p text:style-name="P10">Interaksi dengan Objek</text:p>
          <text:list>
            <text:list-item>
              <text:p text:style-name="P10">pick: mengambil satu objek di petak sekarang.</text:p>
            </text:list-item>
            <text:list-item>
              <text:p text:style-name="P10">drop: meletakkan satu objek di petak sekarang.</text:p>
            </text:list-item>
          </text:list>
        </text:list-item>
        <text:list-item>
          <text:p text:style-name="P10">Sensor/Kondisi</text:p>
          <text:list>
            <text:list-item>
              <text:p text:style-name="P10">wall ahead: bernilai true jika ada dinding tepat satu petak di depan robot.</text:p>
            </text:list-item>
            <text:list-item>
              <text:p text:style-name="P10">mark: true jika ada tanda di petak saat ini.</text:p>
            </text:list-item>
            <text:list-item>
              <text:p text:style-name="P10">heading north/south/east/west: true jika arah hadap sesuai</text:p>
            </text:list-item>
            <text:list-item>
              <text:p text:style-name="P10">not: negasi logis</text:p>
            </text:list-item>
            <text:list-item>
              <text:p text:style-name="P11">and</text:p>
            </text:list-item>
            <text:list-item>
              <text:p text:style-name="P11">or</text:p>
            </text:list-item>
          </text:list>
        </text:list-item>
        <text:list-item>
          <text:p text:style-name="P10"><text:soft-page-break/>Struktur Logika Program</text:p>
          <text:list>
            <text:list-item>
              <text:p text:style-name="P10"><text:span text:style-name="T3">Eksekusi program bersifat </text:span><text:span text:style-name="Strong_20_Emphasis"><text:span text:style-name="T3">imperatif-sekuensial</text:span></text:span><text:span text:style-name="T3">: perintah dijalankan dari atas ke bawah.</text:span></text:p>
            </text:list-item>
            <text:list-item>
              <text:p text:style-name="P12">Rutin (routine) dievaluasi <text:span text:style-name="Strong_20_Emphasis"><text:span text:style-name="T3">secara prosedural</text:span></text:span> tanpa nilai kembalian (no return).</text:p>
            </text:list-item>
          </text:list>
        </text:list-item>
        <text:list-item>
          <text:p text:style-name="P13">Perintah Lainnya:</text:p>
          <text:list>
            <text:list-item>
              <text:p text:style-name="P14"><text:span text:style-name="Source_20_Text"><text:span text:style-name="T4">trace</text:span></text:span><text:span text:style-name="T4">: Menampilkan pesan.</text:span></text:p>
            </text:list-item>
            <text:list-item>
              <text:p text:style-name="P14"><text:span text:style-name="Source_20_Text"><text:span text:style-name="T5">require</text:span></text:span><text:span text:style-name="T5">: Memuat kode dari file atau library lain.</text:span></text:p>
            </text:list-item>
          </text:list>
        </text:list-item>
      </text:list>
      <text:h text:style-name="P15" text:outline-level="2">b) Analisis Berdasarkan Kriteria</text:h>
      <text:p text:style-name="P1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Aspek</text:p>
          </table:table-cell>
          <table:table-cell table:style-name="Table1.A1" office:value-type="string">
            <text:p text:style-name="P17">Kelebihan</text:p>
          </table:table-cell>
          <table:table-cell table:style-name="Table1.C1" office:value-type="string">
            <text:p text:style-name="P17">Kekurangan</text:p>
          </table:table-cell>
        </table:table-row>
        <table:table-row>
          <table:table-cell table:style-name="Table1.A2" office:value-type="string">
            <text:p text:style-name="P18">Readability</text:p>
          </table:table-cell>
          <table:table-cell table:style-name="Table1.A2" office:value-type="string">
            <text:p text:style-name="P19">Sangat tinggi. Kata kunci seperti <text:span text:style-name="Source_20_Text">routine ... means</text:span> dan <text:span text:style-name="Source_20_Text">while ... do</text:span> membuat program mudah dibaca seperti bahasa manusia. Indentasi dan penutupan blok dengan <text:span text:style-name="Source_20_Text">end</text:span> membantu kejelasan struktur.</text:p>
          </table:table-cell>
          <table:table-cell table:style-name="Table1.C2" office:value-type="string">
            <text:p text:style-name="P19">Banyaknya blok <text:span text:style-name="Source_20_Text">end</text:span> bisa membingungkan pada program besar. Tidak ada penanda eksplisit untuk blok panjang selain indentasi manual.</text:p>
          </table:table-cell>
        </table:table-row>
        <table:table-row>
          <table:table-cell table:style-name="Table1.A2" office:value-type="string">
            <text:p text:style-name="P18">Writability</text:p>
          </table:table-cell>
          <table:table-cell table:style-name="Table1.A2" office:value-type="string">
            <text:p text:style-name="P19">Penulisan program sederhana mudah dan cepat. Penggunaan rutin (seperti <text:span text:style-name="Source_20_Text">turnRight</text:span> dari <text:span text:style-name="Source_20_Text">turnLeft</text:span>) mendukung <text:span text:style-name="Strong_20_Emphasis"><text:span text:style-name="T3">abstraksi dan reuse</text:span></text:span>.</text:p>
          </table:table-cell>
          <table:table-cell table:style-name="Table1.C2" office:value-type="string">
            <text:p text:style-name="P20">Tidak mendukung parameter, tipe data, atau nilai kembalian, sehingga kurang fleksibel untuk kasus kompleks.</text:p>
          </table:table-cell>
        </table:table-row>
        <table:table-row>
          <table:table-cell table:style-name="Table1.A2" office:value-type="string">
            <text:p text:style-name="P21">Reliability</text:p>
          </table:table-cell>
          <table:table-cell table:style-name="Table1.A2" office:value-type="string">
            <text:p text:style-name="P20">Sangat andal di domainnya (kontrol robot). Sintaks sederhana mengurangi risiko bug sintaksis.</text:p>
          </table:table-cell>
          <table:table-cell table:style-name="Table1.C2" office:value-type="string">
            <text:p text:style-name="P20">Tidak memiliki sistem error handling. Kesalahan logika menyebabkan program berhenti total.</text:p>
          </table:table-cell>
        </table:table-row>
        <table:table-row>
          <table:table-cell table:style-name="Table1.A2" office:value-type="string">
            <text:p text:style-name="P21">Cost</text:p>
          </table:table-cell>
          <table:table-cell table:style-name="Table1.A2" office:value-type="string">
            <text:p text:style-name="P20">Sangat rendah. Interpreter/simulator biasanya open-source atau digunakan untuk edukasi. Kurva pembelajaran sangat mudah.</text:p>
          </table:table-cell>
          <table:table-cell table:style-name="Table1.C2" office:value-type="string">
            <text:p text:style-name="P20">Tidak memiliki nilai industri; hanya cocok untuk pembelajaran konsep pemrograman dasar.</text:p>
          </table:table-cell>
        </table:table-row>
        <table:table-row>
          <table:table-cell table:style-name="Table1.A2" office:value-type="string">
            <text:p text:style-name="P21">Portability</text:p>
          </table:table-cell>
          <table:table-cell table:style-name="Table1.A2" office:value-type="string">
            <text:p text:style-name="P20">Jika interpreter-nya lintas platform (misal dibuat dengan Java/Python/Web), maka kode dapat dijalankan di berbagai OS tanpa modifikasi.</text:p>
          </table:table-cell>
          <table:table-cell table:style-name="Table1.C2" office:value-type="string">
            <text:p text:style-name="P20">Sintaks bersifat spesifik untuk simulator Kaja. Tidak bisa langsung dijalankan di bahasa lain tanpa konversi manual.</text:p>
          </table:table-cell>
        </table:table-row>
      </table:table>
      <text:list text:style-name="L3">
        <text:list-header>
          <text:p text:style-name="P22"/>
        </text:list-header>
      </text:list>
      <text:h text:style-name="P15" text:outline-level="2"><text:bookmark-end text:name="__DdeLink__434_611367773"/><text:soft-page-break/>c) Cloning Project Robot Kaja (Step-by-Step)</text:h>
      <text:p text:style-name="P23">Copy paste folder saja di File Manager</text:p>
      <text:list text:style-name="L4">
        <text:list-item>
          <text:p text:style-name="P24">Buka direktori projek Robot Kaja di file manager</text:p>
        </text:list-item>
        <text:list-item>
          <text:p text:style-name="P24">Salin seluruh isi folder proyek</text:p>
        </text:list-item>
        <text:list-item>
          <text:p text:style-name="P24">Paste ke lokasi baru</text:p>
        </text:list-item>
        <text:list-item>
          <text:p text:style-name="P24">Ubah nama bila perlu</text:p>
        </text:list-item>
        <text:list-item>
          <text:p text:style-name="P24">Buka proyek hasil salinan di JetBrains MPS melalui menu File &gt; Open</text:p>
        </text:list-item>
      </text:list>
      <text:p text:style-name="P23"><draw:frame draw:style-name="fr1" draw:name="Image1" text:anchor-type="char" svg:width="4.0902in" svg:height="3.5in" draw:z-index="0"><draw:image xlink:href="Pictures/10000000000004E90000043209E703B6.png" xlink:type="simple" xlink:show="embed" xlink:actuate="onLoad" draw:mime-type="image/png"/></draw:frame></text:p>
      <text:p text:style-name="P23"><draw:frame draw:style-name="fr2" draw:name="Image2" text:anchor-type="char" svg:x="1.4047in" svg:y="1.1035in" svg:width="4.1598in" svg:height="3.5in" draw:z-index="1"><draw:image xlink:href="Pictures/10000000000004F00000042786A1FBD7.png" xlink:type="simple" xlink:show="embed" xlink:actuate="onLoad" draw:mime-type="image/png"/></draw:frame></text:p>
      <text:h text:style-name="P25" text:outline-level="2"><text:soft-page-break/>d) Modifikasi Sintaks (Bonus)</text:h>
      <text:p text:style-name="P23">Men<text:span text:style-name="T6">gganti sintaks comment dengan //</text:span></text:p>
      <text:p text:style-name="P23"><draw:frame draw:style-name="fr3" draw:name="Image3" text:anchor-type="char" svg:width="4.7598in" svg:height="3.5in" draw:z-index="2"><draw:image xlink:href="Pictures/10000000000001FF00000177E3E260C9.png" xlink:type="simple" xlink:show="embed" xlink:actuate="onLoad" draw:mime-type="image/png"/></draw:frame></text:p>
      <text:p text:style-name="P26"/>
      <text:p text:style-name="P26"><draw:frame draw:style-name="fr4" draw:name="Image4" text:anchor-type="char" svg:y="-0.1138in" svg:width="6.9252in" svg:height="3.9728in" draw:z-index="3"><draw:image xlink:href="Pictures/1000000000000757000004368D07E671.png" xlink:type="simple" xlink:show="embed" xlink:actuate="onLoad" draw:mime-type="image/png"/></draw:frame></text:p>
      <text:p text:style-name="Text_20_body"><draw:frame draw:style-name="fr1" draw:name="Image5" text:anchor-type="char" svg:width="1.8701in" svg:height="3.5in" draw:z-index="4"><draw:image xlink:href="Pictures/1000000000000196000002F7F151D9CB.png" xlink:type="simple" xlink:show="embed" xlink:actuate="onLoad" draw:mime-type="image/png"/></draw:frame><text:soft-page-break/></text:p>
      <text:h text:style-name="P27" text:outline-level="1"><text:span text:style-name="T7">Analisis bahasa lain (math)</text:span></text:h>
      <text:h text:style-name="P28" text:outline-level="2">a) Sintaks dan Semantik</text:h>
      <text:h text:style-name="P29" text:outline-level="3">Sintaks</text:h>
      <text:p text:style-name="Text_20_body"><text:span text:style-name="T3">Bahasa </text:span><text:span text:style-name="Strong_20_Emphasis"><text:span text:style-name="T3">Math</text:span></text:span><text:span text:style-name="T3"> di MPS memperluas Java dengan simbol dan ekspresi matematis yang menyerupai notasi matematika alami.</text:span></text:p>
      <text:p text:style-name="P30">Contoh fitur sintaksnya:</text:p>
      <text:list text:style-name="L5">
        <text:list-item>
          <text:p text:style-name="P31">Bilangan kompleks: I, exp(a + i*b)</text:p>
        </text:list-item>
        <text:list-item>
          <text:p text:style-name="P31">Matriks dan vektor: matrix&lt;Double&gt; m = ….</text:p>
        </text:list-item>
        <text:list-item>
          <text:p text:style-name="P32"><text:span text:style-name="T8">Penjumlahan dan hasil kali besar: </text:span><text:span text:style-name="Source_20_Text">∑ k in list</text:span>, <text:span text:style-name="Source_20_Text">∏ n in list</text:span></text:p>
        </text:list-item>
        <text:list-item>
          <text:p text:style-name="P32"><text:span text:style-name="Source_20_Text"><text:span text:style-name="T9">Fungsi matematika: sin(x), cos(x), ln(x)</text:span></text:span></text:p>
        </text:list-item>
        <text:list-item>
          <text:p text:style-name="P32"><text:span text:style-name="Source_20_Text"><text:span text:style-name="T9">Ekspresi literal matriks: tanda kurung besar</text:span></text:span></text:p>
          <text:p text:style-name="P32"><draw:frame draw:style-name="fr1" draw:name="Image6" text:anchor-type="char" svg:width="4.1402in" svg:height="3.5in" draw:z-index="5"><draw:image xlink:href="Pictures/1000000000000249000001EE2BE1377B.png" xlink:type="simple" xlink:show="embed" xlink:actuate="onLoad" draw:mime-type="image/png"/></draw:frame><text:soft-page-break/><text:span text:style-name="Source_20_Text"><text:span text:style-name="T9"/></text:span></text:p>
        </text:list-item>
      </text:list>
      <text:h text:style-name="P33" text:outline-level="3"><text:span text:style-name="Source_20_Text"><text:span text:style-name="T10">Semantik</text:span></text:span></text:h>
      <text:p text:style-name="P34"><text:span text:style-name="Source_20_Text"><text:span text:style-name="T9">Setiap ekspresi matematika akan dikompilasi menjadi Java murni menggunakan library runtime yang dihasilkan oleh MPS.<text:line-break/>Contoh: </text:span></text:span><text:span text:style-name="Source_20_Text"><text:span text:style-name="T7">∑ k in list : k*k</text:span></text:span><text:span text:style-name="Source_20_Text"><text:span text:style-name="T9"> menjadi perulangan </text:span></text:span><text:span text:style-name="Source_20_Text"><text:span text:style-name="T7">for (int k : list) sum += k*k;</text:span></text:span><text:span text:style-name="Source_20_Text"><text:span text:style-name="T9">.<text:line-break/>Artinya, hasil akhirnya tetap dijalankan di JVM dengan logika matematis yang sama seperti Java.</text:span></text:span></text:p>
      <text:p text:style-name="P34"><text:span text:style-name="Source_20_Text"><text:span text:style-name="T9"/></text:span></text:p>
      <text:h text:style-name="P35" text:outline-level="2"><text:span text:style-name="Source_20_Text"><text:span text:style-name="T11">b) Contoh Program</text:span></text:span></text:h>
      <text:p text:style-name="P36"><draw:frame draw:style-name="fr3" draw:name="Image7" text:anchor-type="char" svg:width="6.6799in" svg:height="2.3in" draw:z-index="6"><draw:image xlink:href="Pictures/10000000000001C90000009EFB31175F.png" xlink:type="simple" xlink:show="embed" xlink:actuate="onLoad" draw:mime-type="image/png"/></draw:frame><text:span text:style-name="Source_20_Text"><text:span text:style-name="T12"/></text:span></text:p>
      <text:p text:style-name="P36"><text:span text:style-name="Source_20_Text"><text:span text:style-name="T13">Penjelasan Struktur</text:span>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7">Bagian</text:p>
          </table:table-cell>
          <table:table-cell table:style-name="Table4.B1" office:value-type="string">
            <text:p text:style-name="P37">Keterangan</text:p>
          </table:table-cell>
        </table:table-row>
        <text:soft-page-break/>
        <table:table-row>
          <table:table-cell table:style-name="Table4.A2" office:value-type="string">
            <text:p text:style-name="P38"><text:span text:style-name="Source_20_Text"><text:span text:style-name="T3">public class Sample2</text:span></text:span></text:p>
          </table:table-cell>
          <table:table-cell table:style-name="Table4.B2" office:value-type="string">
            <text:p text:style-name="P39">Mendefinisikan kelas utama tempat program dijalankan.</text:p>
          </table:table-cell>
        </table:table-row>
        <table:table-row>
          <table:table-cell table:style-name="Table4.A2" office:value-type="string">
            <text:p text:style-name="P38"><text:span text:style-name="Source_20_Text"><text:span text:style-name="T3">public static void main(String[] args)</text:span></text:span></text:p>
          </table:table-cell>
          <table:table-cell table:style-name="Table4.B2" office:value-type="string">
            <text:p text:style-name="P40">Titik awal eksekusi program seperti pada Java biasa.</text:p>
          </table:table-cell>
        </table:table-row>
        <table:table-row>
          <table:table-cell table:style-name="Table4.A2" office:value-type="string">
            <text:p text:style-name="P38"><text:span text:style-name="Source_20_Text"><text:span text:style-name="T3">System.out.println(String.valueOf(...))</text:span></text:span></text:p>
          </table:table-cell>
          <table:table-cell table:style-name="Table4.B2" office:value-type="string">
            <text:p text:style-name="P40">Menampilkan hasil ekspresi matematika ke layar.</text:p>
          </table:table-cell>
        </table:table-row>
        <table:table-row>
          <table:table-cell table:style-name="Table4.A2" office:value-type="string">
            <text:p text:style-name="P38"><text:span text:style-name="Source_20_Text"><text:span text:style-name="T3">∑ k = 0 </text:span></text:span><text:span text:style-name="Source_20_Text"><text:span text:style-name="T14">to 99</text:span></text:span><text:span text:style-name="Source_20_Text"><text:span text:style-name="T3"> (k * 2)</text:span></text:span></text:p>
          </table:table-cell>
          <table:table-cell table:style-name="Table4.B2" office:value-type="string">
            <text:p text:style-name="P38"><text:span text:style-name="T3">Ekspresi </text:span><text:span text:style-name="Strong_20_Emphasis"><text:span text:style-name="T3">penjumlahan besar (BigSumExpression)</text:span></text:span><text:span text:style-name="T3"> — melakukan penjumlahan dari nilai </text:span><text:span text:style-name="Source_20_Text"><text:span text:style-name="T3">k</text:span></text:span><text:span text:style-name="T3"> mulai dari 0 hingga batas yang didefinisikan di runtime </text:span><text:span text:style-name="T14">yaitu 99</text:span><text:span text:style-name="T3">.</text:span></text:p>
          </table:table-cell>
        </table:table-row>
        <table:table-row>
          <table:table-cell table:style-name="Table4.A2" office:value-type="string">
            <text:p text:style-name="P37">K * 2</text:p>
          </table:table-cell>
          <table:table-cell table:style-name="Table4.B2" office:value-type="string">
            <text:p text:style-name="P39">Badan ekspresi, yaitu nilai yang dijumlahkan setiap iterasi.</text:p>
          </table:table-cell>
        </table:table-row>
      </table:table>
      <text:p text:style-name="P36"><text:span text:style-name="Source_20_Text"><text:span text:style-name="T13"/></text:span></text:p>
      <text:p text:style-name="P36"><text:span text:style-name="Source_20_Text"><text:span text:style-name="T13">Penjelasan </text:span></text:span></text:p>
      <text:h text:style-name="P41" text:outline-level="2"><text:span text:style-name="Source_20_Text"><text:span text:style-name="T15">c) </text:span></text:span><text:span text:style-name="Source_20_Text"><text:span text:style-name="T12">Kritik Bahasa Math (MPS)</text:span></text:span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2">Aspek</text:p>
          </table:table-cell>
          <table:table-cell table:style-name="Table2.A1" office:value-type="string">
            <text:p text:style-name="P42">Kelebihan</text:p>
          </table:table-cell>
          <table:table-cell table:style-name="Table2.C1" office:value-type="string">
            <text:p text:style-name="P42">Kekurangan</text:p>
          </table:table-cell>
        </table:table-row>
        <table:table-row>
          <table:table-cell table:style-name="Table2.A2" office:value-type="string">
            <text:p text:style-name="P43">Readability</text:p>
          </table:table-cell>
          <table:table-cell table:style-name="Table2.A2" office:value-type="string">
            <text:p text:style-name="P44">Sangat tinggi. menulis ekspresi seperti dalam notasi matematika (<text:span text:style-name="Source_20_Text">∑</text:span>, <text:span text:style-name="Source_20_Text">∏</text:span>, <text:span text:style-name="Source_20_Text">matrix</text:span>, <text:span text:style-name="Source_20_Text">sin</text:span>, <text:span text:style-name="Source_20_Text">exp</text:span>). Mudah dipahami oleh orang dengan latar belakang ilmiah.</text:p>
          </table:table-cell>
          <table:table-cell table:style-name="Table2.C2" office:value-type="string">
            <text:p text:style-name="P44">Membingungkan untuk programmer biasa yang hanya mengenal sintaks Java murni.</text:p>
          </table:table-cell>
        </table:table-row>
        <table:table-row>
          <table:table-cell table:style-name="Table2.A2" office:value-type="string">
            <text:p text:style-name="P43">Writability</text:p>
          </table:table-cell>
          <table:table-cell table:style-name="Table2.A2" office:value-type="string">
            <text:p text:style-name="P44">Penulisan cepat dan ekspresif untuk operasi matematis kompleks (matriks, bilangan kompleks, dsb).</text:p>
          </table:table-cell>
          <table:table-cell table:style-name="Table2.C2" office:value-type="string">
            <text:p text:style-name="P45">Harus menggunakan MPS editor, <text:span text:style-name="T15">t</text:span>idak bisa diketik di text editor biasa.</text:p>
          </table:table-cell>
        </table:table-row>
        <table:table-row>
          <table:table-cell table:style-name="Table2.A2" office:value-type="string">
            <text:p text:style-name="P46">Reliability</text:p>
          </table:table-cell>
          <table:table-cell table:style-name="Table2.A2" office:value-type="string">
            <text:p text:style-name="P45">Semantik kuat karena semua tipe matematis dicek oleh sistem tipe MPS. Kesalahan semantik jarang.</text:p>
          </table:table-cell>
          <table:table-cell table:style-name="Table2.C2" office:value-type="string">
            <text:p text:style-name="P45">Namun debugging sulit, karena hasilnya diterjemahkan ke Java code yang panjang dan tidak intuitif.</text:p>
          </table:table-cell>
        </table:table-row>
        <table:table-row>
          <table:table-cell table:style-name="Table2.A2" office:value-type="string">
            <text:p text:style-name="P46">Cost</text:p>
          </table:table-cell>
          <table:table-cell table:style-name="Table2.A2" office:value-type="string">
            <text:p text:style-name="P45">Gratis (open source MPS), mendukung eksperimen akademik dan edukatif.</text:p>
          </table:table-cell>
          <table:table-cell table:style-name="Table2.C2" office:value-type="string">
            <text:p text:style-name="P45">Biaya belajar tinggi. perlu memahami konsep <text:span text:style-name="Emphasis">language workbench</text:span>, <text:span text:style-name="Emphasis">concept</text:span>, <text:span text:style-name="Emphasis">reduction rule</text:span>, dll.</text:p>
          </table:table-cell>
        </table:table-row>
        <table:table-row>
          <table:table-cell table:style-name="Table2.A2" office:value-type="string">
            <text:p text:style-name="P46">Portability</text:p>
          </table:table-cell>
          <table:table-cell table:style-name="Table2.A2" office:value-type="string">
            <text:p text:style-name="P45">Kode hasilnya adalah Java, artinya bisa dijalankan di semua platform Java.</text:p>
          </table:table-cell>
          <table:table-cell table:style-name="Table2.C2" office:value-type="string">
            <text:p text:style-name="P45">Tapi kode sumber dalam format MPS (model) tidak mudah dipindahkan ke IDE lain atau sistem tanpa MPS.</text:p>
          </table:table-cell>
        </table:table-row>
      </table:table>
      <text:p text:style-name="P47"><text:span text:style-name="Source_20_Text"><text:span text:style-name="T12"/></text:span></text:p>
      <text:p text:style-name="P36"><text:span text:style-name="Source_20_Text"><text:span text:style-name="T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07:44:26.290696009</meta:creation-date>
    <dc:date>2025-10-20T19:30:34.025217655</dc:date>
    <meta:editing-duration>PT33M6S</meta:editing-duration>
    <meta:editing-cycles>2</meta:editing-cycles>
    <meta:generator>LibreOffice/25.8.2.2$Linux_X86_64 LibreOffice_project/580$Build-2</meta:generator>
    <meta:document-statistic meta:table-count="3" meta:image-count="7" meta:object-count="0" meta:page-count="8" meta:paragraph-count="139" meta:word-count="841" meta:character-count="5688" meta:non-whitespace-character-count="5001"/>
  </office:meta>
</office:document-meta>
</file>